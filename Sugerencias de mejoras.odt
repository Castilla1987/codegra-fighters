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📋 RESUMEN DEL PLAN DE IMPLEMENTACIÓN</text:p>
      <text:p text:style-name="Standard"/>
      <text:p text:style-name="Standard"><text:s text:c="2"/>Orden recomendado (de mayor a menor impacto y menor riesgo):</text:p>
      <text:p text:style-name="Standard"/>
      <text:p text:style-name="Standard"><text:s text:c="2"/>1. Optimización de assets (reduce tamaño de carga 70%+)</text:p>
      <text:p text:style-name="Standard"><text:s text:c="2"/>2. Modo entrenamiento/practice (nueva característica sin romper lo existente)</text:p>
      <text:p text:style-name="Standard"><text:s text:c="2"/>3. Mejoras al sistema de combo (core gameplay)</text:p>
      <text:p text:style-name="Standard"><text:s text:c="2"/>4. IA más inteligente (core gameplay)</text:p>
      <text:p text:style-name="Standard"><text:s text:c="2"/>5. Opciones de accesibilidad y pulido (mejora UX)</text:p>
      <text:p text:style-name="Standard"><text:s text:c="2"/>6. Almacenamiento local para logros/récords (persistencia)</text:p>
      <text:p text:style-name="Standard"/>
      <text:p text:style-name="Standard"><text:s text:c="2"/>▎ ⚠️ IMPORTANTE: Antes de hacer cambios, haz una copia de seguridad de tu archivo actual. Trabaja en una copia primero para probar los cambios.</text:p>
      <text:p text:style-name="Standard"/>
      <text:p text:style-name="Standard"><text:s text:c="2"/>---</text:p>
      <text:p text:style-name="Standard"><text:s text:c="2"/>1. 🚀 OPTIMIZACIÓN DE ASSETS (PRIORIDAD ALTA)</text:p>
      <text:p text:style-name="Standard"/>
      <text:p text:style-name="Standard"><text:s text:c="2"/>Problema: Tu archivo HTML tiene 512KB principalmente debido a imágenes embebidas en base64 (personajes, sprites, partes pixel art, etc.). Esto hace que la carga inicial sea lenta y no se beneficie del caché</text:p>
      <text:p text:style-name="Standard"><text:s text:c="2"/>del navegador.</text:p>
      <text:p text:style-name="Standard"/>
      <text:p text:style-name="Standard"><text:s text:c="2"/>Solución: Extraer las imágenes a archivos externos (.png) y cargarlas desde URLs relativas, manteniendo el base64 como fallback de emergencia.</text:p>
      <text:p text:style-name="Standard"/>
      <text:p text:style-name="Standard"><text:s text:c="2"/>Pasos a seguir:</text:p>
      <text:p text:style-name="Standard"/>
      <text:p text:style-name="Standard"><text:s text:c="2"/>Paso 1: Crear carpeta de assets</text:p>
      <text:p text:style-name="Standard"/>
      <text:p text:style-name="Standard"><text:s text:c="2"/>En el mismo directorio donde está tu Codegra fighters.html, crea una carpeta llamada assets y dentro de ella:</text:p>
      <text:p text:style-name="Standard"><text:s text:c="2"/>- assets/characters/ (para sprites de personajes)</text:p>
      <text:p text:style-name="Standard"><text:s text:c="2"/>- assets/javier/ (para animaciones específicas de Javier)</text:p>
      <text:p text:style-name="Standard"><text:s text:c="2"/>- assets/pixel/ (para partes del rig pixel art)</text:p>
      <text:p text:style-name="Standard"><text:s text:c="2"/>- assets/enemies/ (para imágenes de enemigos si decides añadirlas)</text:p>
      <text:p text:style-name="Standard"><text:s text:c="2"/>- assets/stages/ (para fondos de escenario personalizados)</text:p>
      <text:p text:style-name="Standard"/>
      <text:p text:style-name="Standard"><text:s text:c="2"/>Paso 2: Extraer y optimizar imágenes</text:p>
      <text:p text:style-name="Standard"/>
      <text:p text:style-name="Standard"><text:s text:c="2"/>Usa una herramienta como https://tinyjpg.com o https://imageoptim.com para:</text:p>
      <text:p text:style-name="Standard"><text:s text:c="2"/>1. Convertir cada data URI base64 a archivo PNG</text:p>
      <text:p text:style-name="Standard"><text:s text:c="2"/>2. Optimizar el tamaño sin perder calidad perceptible</text:p>
      <text:p text:style-name="Standard"><text:s text:c="2"/>3. Nombrar los archivos de forma descriptiva</text:p>
      <text:p text:style-name="Standard"/>
      <text:p text:style-name="Standard"><text:s text:c="2"/>Ejemplo de conversión:</text:p>
      <text:p text:style-name="Standard"><text:s text:c="2"/>- Base64 de marcos.head → assets/characters/marcos_head.png</text:p>
      <text:p text:style-name="Standard"><text:s text:c="2"/>- Base64 de JAVIER_PUNCH_IMGS[0] → assets/javier/punch_0.png</text:p>
      <text:p text:style-name="Standard"/>
      <text:p text:style-name="Standard"><text:s text:c="2"/>Paso 3: Modificar la sección de carga de assets</text:p>
      <text:p text:style-name="Standard"/>
      <text:p text:style-name="Standard"><text:s text:c="2"/>Busca en tu código la sección alrededor de la línea 1198 donde dice /* preload images */ y reemplázala con este código optimizado:</text:p>
      <text:p text:style-name="Standard"><text:soft-page-break/></text:p>
      <text:p text:style-name="Standard"><text:s text:c="2"/>/* =================== ASSET LOADING OPTIMIZADO =================== */</text:p>
      <text:p text:style-name="Standard"><text:s text:c="2"/>// Función helper para cargar imagen con fallback a base64</text:p>
      <text:p text:style-name="Standard"><text:s text:c="2"/>function loadImageWithFallback(url, fallbackBase64) {</text:p>
      <text:p text:style-name="Standard"><text:s text:c="6"/>const img = new Image();</text:p>
      <text:p text:style-name="Standard"><text:s text:c="6"/>img.src = url;</text:p>
      <text:p text:style-name="Standard"><text:s text:c="6"/>// Si la carga falla (ej: archivo no encontrado), usar base64 como fallback</text:p>
      <text:p text:style-name="Standard"><text:s text:c="6"/>img.onerror = () =&gt; {</text:p>
      <text:p text:style-name="Standard"><text:s text:c="10"/>console.warn(`Asset no encontrado: ${url}. Usando fallback base64.`);</text:p>
      <text:p text:style-name="Standard"><text:s text:c="10"/>img.src = fallbackBase64;</text:p>
      <text:p text:style-name="Standard"><text:s text:c="6"/>};</text:p>
      <text:p text:style-name="Standard"><text:s text:c="6"/>return img;</text:p>
      <text:p text:style-name="Standard"><text:s text:c="2"/>}</text:p>
      <text:p text:style-name="Standard"/>
      <text:p text:style-name="Standard"><text:s text:c="2"/>/* preload images - VERSION OPTIMIZADA */</text:p>
      <text:p text:style-name="Standard"><text:s text:c="2"/>const IMAGES = {};</text:p>
      <text:p text:style-name="Standard"><text:s text:c="2"/>const IMAGE_LOAD_PROMISES = [];</text:p>
      <text:p text:style-name="Standard"/>
      <text:p text:style-name="Standard"><text:s text:c="2"/>// Cargar imágenes normales (toon/foto)</text:p>
      <text:p text:style-name="Standard"><text:s text:c="2"/>for(const k in IMG_SRC){</text:p>
      <text:p text:style-name="Standard"><text:s text:c="6"/>const img = loadImageWithFallback(</text:p>
      <text:p text:style-name="Standard"><text:s text:c="10"/>`assets/${k}.png`, // Intentar cargar desde archivo externo</text:p>
      <text:p text:style-name="Standard"><text:s text:c="10"/>IMG_SRC[k] <text:s text:c="8"/>// Fallback a base64</text:p>
      <text:p text:style-name="Standard"><text:s text:c="6"/>);</text:p>
      <text:p text:style-name="Standard"><text:s text:c="6"/>IMAGES[k] = img;</text:p>
      <text:p text:style-name="Standard"><text:s text:c="6"/>IMAGE_LOAD_PROMISES.push(</text:p>
      <text:p text:style-name="Standard"><text:s text:c="10"/>new Promise(resolve =&gt; { img.onload = img.onerror = resolve; })</text:p>
      <text:p text:style-name="Standard"><text:s text:c="6"/>);</text:p>
      <text:p text:style-name="Standard"><text:s text:c="2"/>}</text:p>
      <text:p text:style-name="Standard"/>
      <text:p text:style-name="Standard"><text:s text:c="2"/>// Similar para IMAGES_TOON y IMAGES_PIXEL</text:p>
      <text:p text:style-name="Standard"><text:s text:c="2"/>const IMAGES_TOON = {};</text:p>
      <text:p text:style-name="Standard"><text:s text:c="2"/>for(const k in IMG_SRC_TOON){</text:p>
      <text:p text:style-name="Standard"><text:s text:c="6"/>const img = loadImageWithFallback(</text:p>
      <text:p text:style-name="Standard"><text:s text:c="10"/>`assets/toon/${k}.png`,</text:p>
      <text:p text:style-name="Standard"><text:s text:c="10"/>IMG_SRC_TOON[k]</text:p>
      <text:p text:style-name="Standard"><text:s text:c="6"/>);</text:p>
      <text:p text:style-name="Standard"><text:s text:c="6"/>IMAGES_TOON[k]=img;</text:p>
      <text:p text:style-name="Standard"><text:s text:c="6"/>IMAGE_LOAD_PROMISES.push(</text:p>
      <text:p text:style-name="Standard"><text:s text:c="10"/>new Promise(resolve =&gt; { img.onload = img.onerror = resolve; })</text:p>
      <text:p text:style-name="Standard"><text:s text:c="6"/>);</text:p>
      <text:p text:style-name="Standard"><text:s text:c="2"/>}</text:p>
      <text:p text:style-name="Standard"/>
      <text:p text:style-name="Standard"><text:s text:c="2"/>const IMAGES_PIXEL = {};</text:p>
      <text:p text:style-name="Standard"><text:s text:c="2"/>for(const k in IMG_SRC_PIXEL){</text:p>
      <text:p text:style-name="Standard"><text:s text:c="6"/>const img = loadImageWithFallback(</text:p>
      <text:p text:style-name="Standard"><text:s text:c="10"/>`assets/pixel/${k}.png`,</text:p>
      <text:p text:style-name="Standard"><text:s text:c="10"/>IMG_SRC_PIXEL[k]</text:p>
      <text:p text:style-name="Standard"><text:s text:c="6"/>);</text:p>
      <text:p text:style-name="Standard"><text:s text:c="6"/>IMAGES_PIXEL[k]=img;</text:p>
      <text:p text:style-name="Standard"><text:s text:c="6"/>IMAGE_LOAD_PROMISES.push(</text:p>
      <text:p text:style-name="Standard"><text:s text:c="10"/>new Promise(resolve =&gt; { img.onload = img.onerror = resolve; })</text:p>
      <text:p text:style-name="Standard"><text:soft-page-break/><text:s text:c="6"/>);</text:p>
      <text:p text:style-name="Standard"><text:s text:c="2"/>}</text:p>
      <text:p text:style-name="Standard"/>
      <text:p text:style-name="Standard"><text:s text:c="2"/>/* preload limb pieces for skeletal pixel-art animation */</text:p>
      <text:p text:style-name="Standard"><text:s text:c="2"/>const PIXEL_PARTS = {};</text:p>
      <text:p text:style-name="Standard"><text:s text:c="2"/>for(const charId in IMG_SRC_PIXEL_PARTS){</text:p>
      <text:p text:style-name="Standard"><text:s text:c="6"/>PIXEL_PARTS[charId] = {};</text:p>
      <text:p text:style-name="Standard"><text:s text:c="6"/>PIXEL_PART_NAMES.forEach(p=&gt;{</text:p>
      <text:p text:style-name="Standard"><text:s text:c="10"/>const im = loadImageWithFallback(</text:p>
      <text:p text:style-name="Standard"><text:s text:c="14"/>`assets/pixel/${charId}/${p}.png`,</text:p>
      <text:p text:style-name="Standard"><text:s text:c="14"/>IMG_SRC_PIXEL_PARTS[charId][p]</text:p>
      <text:p text:style-name="Standard"><text:s text:c="10"/>);</text:p>
      <text:p text:style-name="Standard"><text:s text:c="10"/>PIXEL_PARTS[charId][p] = im;</text:p>
      <text:p text:style-name="Standard"><text:s text:c="6"/>});</text:p>
      <text:p text:style-name="Standard"><text:s text:c="2"/>}</text:p>
      <text:p text:style-name="Standard"/>
      <text:p text:style-name="Standard"><text:s text:c="2"/>/* Esperar a que todas las imágenes carguen antes de iniciar */</text:p>
      <text:p text:style-name="Standard"><text:s text:c="2"/>Promise.all(IMAGE_LOAD_PROMISES).then(() =&gt; {</text:p>
      <text:p text:style-name="Standard"><text:s text:c="6"/>console.log("Todos los assets cargados correctamente");</text:p>
      <text:p text:style-name="Standard"><text:s text:c="6"/>// Aquí puedes iniciar el juego o mostrar un mensaje de "Listo para jugar"</text:p>
      <text:p text:style-name="Standard"><text:s text:c="2"/>}).catch(err =&gt; {</text:p>
      <text:p text:style-name="Standard"><text:s text:c="6"/>console.error("Error al cargar algunos assets:", err);</text:p>
      <text:p text:style-name="Standard"><text:s text:c="2"/>});</text:p>
      <text:p text:style-name="Standard"/>
      <text:p text:style-name="Standard"><text:s text:c="2"/>Paso 4: Actualizar las rutas de Javier (animaciones específicas)</text:p>
      <text:p text:style-name="Standard"/>
      <text:p text:style-name="Standard"><text:s text:c="2"/>Busca donde se definen las constantes como IMG_JAVIER_WALK_0, etc. (alrededor de línea 1246) y cámbialas a:</text:p>
      <text:p text:style-name="Standard"/>
      <text:p text:style-name="Standard"><text:s text:c="2"/>// Ejemplo para Javier walk frames</text:p>
      <text:p text:style-name="Standard"><text:s text:c="2"/>const IMG_JAVIER_WALK_0 = 'assets/javier/walk_0.png';</text:p>
      <text:p text:style-name="Standard"><text:s text:c="2"/>const IMG_JAVIER_WALK_1 = 'assets/javier/walk_1.png';</text:p>
      <text:p text:style-name="Standard"><text:s text:c="2"/>// ... y así sucesivamente para todas las variantes de Javier</text:p>
      <text:p text:style-name="Standard"/>
      <text:p text:style-name="Standard"><text:s text:c="2"/>Paso 5: Actualizar CONFIG.STAGE_BG_IMAGES (si lo usas)</text:p>
      <text:p text:style-name="Standard"/>
      <text:p text:style-name="Standard"><text:s text:c="2"/>Si utilizas fondos personalizados en CONFIG.STAGE_BG_IMAGES, cambia las rutas a:</text:p>
      <text:p text:style-name="Standard"><text:s text:c="2"/>STAGE_BG_IMAGES: {</text:p>
      <text:p text:style-name="Standard"><text:s text:c="6"/>recepcion: 'assets/stages/recepcion.png',</text:p>
      <text:p text:style-name="Standard"><text:s text:c="6"/>salajuntas: 'assets/stages/salajuntas.png',</text:p>
      <text:p text:style-name="Standard"><text:s text:c="6"/>// etc.</text:p>
      <text:p text:style-name="Standard"><text:s text:c="2"/>}</text:p>
      <text:p text:style-name="Standard"/>
      <text:p text:style-name="Standard"><text:s text:c="2"/>✅ Beneficios esperados:</text:p>
      <text:p text:style-name="Standard"/>
      <text:p text:style-name="Standard"><text:s text:c="2"/>- Reducción de tamaño inicial: De ~512KB a ~50-100KB (solo el código + HTML)</text:p>
      <text:p text:style-name="Standard"><text:s text:c="2"/>- Caché del navegador: Las imágenes se almacenan en caché y no se vuelven a descargar</text:p>
      <text:p text:style-name="Standard"><text:s text:c="2"/>- Carga progresiva: El usuario puede empezar a interactuar mientras se cargan las imágenes</text:p>
      <text:p text:style-name="Standard"><text:s text:c="2"/>- Más fácil de modificar: Puedes reemplazar un personaje simplemente sustituyendo su PNG</text:p>
      <text:p text:style-name="Standard"/>
      <text:p text:style-name="Standard"><text:s text:c="2"/>📝 Notas importantes:</text:p>
      <text:p text:style-name="Standard"/>
      <text:p text:style-name="Standard"><text:soft-page-break/><text:s text:c="2"/>1. Prueba abriendo tu archivo HTML desde un servidor local (ej: python -m http.server o extensiones como Live Server en VS Code) para evitar problemas de CORS con archivos locales</text:p>
      <text:p text:style-name="Standard"><text:s text:c="2"/>2. Mantén los datos base64 en el código como fallback por si los archivos no se encuentran (muy útil durante desarrollo)</text:p>
      <text:p text:style-name="Standard"><text:s text:c="2"/>3. Puedes implementar esto gradualmente: empieza con los personajes principales, luego los efectos, etc.</text:p>
      <text:p text:style-name="Standard"/>
      <text:p text:style-name="Standard"><text:s text:c="2"/>---</text:p>
      <text:p text:style-name="Standard"><text:s text:c="2"/>2. 🎮 MODO ENTRENAMIENTO/PRACTICE (NUEVA CARACTERÍSTICA)</text:p>
      <text:p text:style-name="Standard"/>
      <text:p text:style-name="Standard"><text:s text:c="2"/>Problema: Los jugadores no tienen un lugar seguro para practicar combos, aprender movimientos o experimentar con la mecánica sin presión.</text:p>
      <text:p text:style-name="Standard"/>
      <text:p text:style-name="Standard"><text:s text:c="2"/>Solución: Añadir un nuevo modo de juego accesible desde el menú principal que permita:</text:p>
      <text:p text:style-name="Standard"><text:s text:c="2"/>- Practicar contra un oponente estático o con IA configurable</text:p>
      <text:p text:style-name="Standard"><text:s text:c="2"/>- Ver hitboxes/hurtboxes (modo debug)</text:p>
      <text:p text:style-name="Standard"><text:s text:c="2"/>- Recargar vida y meter instantáneamente</text:p>
      <text:p text:style-name="Standard"><text:s text:c="2"/>- Configurar comportamiento del oponente dummy</text:p>
      <text:p text:style-name="Standard"/>
      <text:p text:style-name="Standard"><text:s text:c="2"/>Pasos a seguir:</text:p>
      <text:p text:style-name="Standard"/>
      <text:p text:style-name="Standard"><text:s text:c="2"/>Paso 1: Añadir opción al menú principal</text:p>
      <text:p text:style-name="Standard"/>
      <text:p text:style-name="Standard"><text:s text:c="2"/>Busca la sección del menú título (alrededor de línea 528 donde comienza &lt;!-- TITLE --&gt;) y agrega un nuevo botón:</text:p>
      <text:p text:style-name="Standard"/>
      <text:p text:style-name="Standard"><text:s text:c="2"/>&lt;!-- TITLE --&gt;</text:p>
      <text:p text:style-name="Standard"><text:s text:c="2"/>&lt;div class="screen" id="screen-title" style="padding:0;overflow:hidden;border:none;background:#000;"&gt;</text:p>
      <text:p text:style-name="Standard"><text:s text:c="6"/>&lt;!-- ... contenido existente ... --&gt;</text:p>
      <text:p text:style-name="Standard"><text:s text:c="6"/>&lt;div class="title-btns" style="flex-direction:column; align-items:center; gap:10px; margin-top:6px;"&gt;</text:p>
      <text:p text:style-name="Standard"><text:s text:c="10"/>&lt;!-- Botones existentes --&gt;</text:p>
      <text:p text:style-name="Standard"><text:s text:c="10"/>&lt;button class="btn" id="title-btn-entrenamiento"&gt;ENTRENAMIENTO&lt;/button&gt;</text:p>
      <text:p text:style-name="Standard"><text:s text:c="10"/>&lt;!-- ... resto de botones ... --&gt;</text:p>
      <text:p text:style-name="Standard"><text:s text:c="6"/>&lt;/div&gt;</text:p>
      <text:p text:style-name="Standard"><text:s text:c="2"/>&lt;/div&gt;</text:p>
      <text:p text:style-name="Standard"/>
      <text:p text:style-name="Standard"><text:s text:c="2"/>Paso 2: Añadir manejador del botón</text:p>
      <text:p text:style-name="Standard"/>
      <text:p text:style-name="Standard"><text:s text:c="2"/>Busca la sección de manejadores de título (alrededor de línea 1397 donde dice /* Title screen button handlers */) y agrega:</text:p>
      <text:p text:style-name="Standard"/>
      <text:p text:style-name="Standard"><text:s text:c="2"/>document.getElementById('title-btn-entrenamiento').onclick=()=&gt;{</text:p>
      <text:p text:style-name="Standard"><text:s text:c="6"/>startBgMusic();</text:p>
      <text:p text:style-name="Standard"><text:s text:c="6"/>AudioEngine.init();</text:p>
      <text:p text:style-name="Standard"><text:s text:c="6"/>AudioEngine.startMusic();</text:p>
      <text:p text:style-name="Standard"><text:s text:c="6"/>showScreen('screen-training'); // Nueva pantalla</text:p>
      <text:p text:style-name="Standard"><text:s text:c="2"/>};</text:p>
      <text:p text:style-name="Standard"/>
      <text:p text:style-name="Standard"><text:s text:c="2"/>Paso 3: Crear la pantalla de entrenamiento</text:p>
      <text:p text:style-name="Standard"/>
      <text:p text:style-name="Standard"><text:soft-page-break/><text:s text:c="2"/>Añade esta sección HTML después de las demás pantallas (antes del cierre de &lt;/body&gt;):</text:p>
      <text:p text:style-name="Standard"/>
      <text:p text:style-name="Standard"><text:s text:c="2"/>&lt;!-- TRAINING SCREEN --&gt;</text:p>
      <text:p text:style-name="Standard"><text:s text:c="2"/>&lt;div class="screen hidden" id="screen-training"&gt;</text:p>
      <text:p text:style-name="Standard"><text:s text:c="6"/>&lt;h1 class="title"&gt;MODO ENTRENAMIENTO&lt;/h1&gt;</text:p>
      <text:p text:style-name="Standard"/>
      <text:p text:style-name="Standard"><text:s text:c="6"/>&lt;!-- Panel de configuración --&gt;</text:p>
      <text:p text:style-name="Standard"><text:s text:c="6"/>&lt;div style="background:rgba(0,0,0,0.5); padding:20px; border-radius:10px; margin:20px auto; max-width:400px;"&gt;</text:p>
      <text:p text:style-name="Standard"><text:s text:c="10"/>&lt;h2 style="color:var(--accent2); text-align:center;"&gt;Configuración&lt;/h2&gt;</text:p>
      <text:p text:style-name="Standard"/>
      <text:p text:style-name="Standard"><text:s text:c="10"/>&lt;!-- Oponente --&gt;</text:p>
      <text:p text:style-name="Standard"><text:s text:c="10"/>&lt;div style="margin:15px 0;"&gt;</text:p>
      <text:p text:style-name="Standard"><text:s text:c="14"/>&lt;label style="display:block; margin-bottom:5px; color:var(--cream);"&gt;Oponente:&lt;/label&gt;</text:p>
      <text:p text:style-name="Standard"><text:s text:c="14"/>&lt;select id="training-opponent" style="width:100%; padding:8px; background:#1b2a4a; border:2px solid var(--accent2); border-radius:5px; color:var(--cream);"&gt;</text:p>
      <text:p text:style-name="Standard"><text:s text:c="18"/>&lt;option value="static"&gt;Estático (no se mueve)&lt;/option&gt;</text:p>
      <text:p text:style-name="Standard"><text:s text:c="18"/>&lt;option value="passive"&gt;Pasivo (solo bloquea ocasionalmente)&lt;/option&gt;</text:p>
      <text:p text:style-name="Standard"><text:s text:c="18"/>&lt;option value="aggressive"&gt;Agresivo (ataca aleatoriamente)&lt;/option&gt;</text:p>
      <text:p text:style-name="Standard"><text:s text:c="18"/>&lt;option value="mirror"&gt;Espejo (copia tus movimientos)&lt;/option&gt;</text:p>
      <text:p text:style-name="Standard"><text:s text:c="14"/>&lt;/select&gt;</text:p>
      <text:p text:style-name="Standard"><text:s text:c="10"/>&lt;/div&gt;</text:p>
      <text:p text:style-name="Standard"/>
      <text:p text:style-name="Standard"><text:s text:c="10"/>&lt;!-- Salud y Meter --&gt;</text:p>
      <text:p text:style-name="Standard"><text:s text:c="10"/>&lt;div style="margin:15px 0;"&gt;</text:p>
      <text:p text:style-name="Standard"><text:s text:c="14"/>&lt;label style="display:block; margin-bottom:5px; color:var(--cream);"&gt;Recargar:&lt;/label&gt;</text:p>
      <text:p text:style-name="Standard"><text:s text:c="14"/>&lt;div style="display:flex; gap:10px; flex-wrap:wrap;"&gt;</text:p>
      <text:p text:style-name="Standard"><text:s text:c="18"/>&lt;button class="btn small" id="btn-refill-hp"&gt;HP Completo&lt;/button&gt;</text:p>
      <text:p text:style-name="Standard"><text:s text:c="18"/>&lt;button class="btn small" id="btn-refill-meter"&gt;Meter Completo&lt;/button&gt;</text:p>
      <text:p text:style-name="Standard"><text:s text:c="18"/>&lt;button class="btn small" id="btn-reset-position"&gt;Reset Posición&lt;/button&gt;</text:p>
      <text:p text:style-name="Standard"><text:s text:c="14"/>&lt;/div&gt;</text:p>
      <text:p text:style-name="Standard"><text:s text:c="10"/>&lt;/div&gt;</text:p>
      <text:p text:style-name="Standard"/>
      <text:p text:style-name="Standard"><text:s text:c="10"/>&lt;!-- Debug visuales --&gt;</text:p>
      <text:p text:style-name="Standard"><text:s text:c="10"/>&lt;div style="margin:15px 0;"&gt;</text:p>
      <text:p text:style-name="Standard"><text:s text:c="14"/>&lt;label style="display:block; margin-bottom:5px; color:var(--cream);"&gt;Visuales de Debug:&lt;/label&gt;</text:p>
      <text:p text:style-name="Standard"><text:s text:c="14"/>&lt;div style="display:flex; gap:10px; flex-wrap:wrap;"&gt;</text:p>
      <text:p text:style-name="Standard"><text:s text:c="18"/>&lt;label style="color:var(--cream);"&gt;&lt;input type="checkbox" id="debug-hitboxes"&gt; Hitboxes&lt;/label&gt;</text:p>
      <text:p text:style-name="Standard"><text:s text:c="18"/>&lt;label style="color:var(--cream);"&gt;&lt;input type="checkbox" id="debug-hurtboxes"&gt; Hurtboxes&lt;/label&gt;</text:p>
      <text:p text:style-name="Standard"><text:s text:c="18"/>&lt;label style="color:var(--cream);"&gt;&lt;input type="checkbox" id="debug-frame-data"&gt; Frame Data&lt;/label&gt;</text:p>
      <text:p text:style-name="Standard"><text:s text:c="14"/>&lt;/div&gt;</text:p>
      <text:p text:style-name="Standard"><text:s text:c="10"/>&lt;/div&gt;</text:p>
      <text:p text:style-name="Standard"/>
      <text:p text:style-name="Standard"><text:s text:c="10"/>&lt;!-- Controles de ayuda --&gt;</text:p>
      <text:p text:style-name="Standard"><text:s text:c="10"/>&lt;div style="margin:15px 0; text-align:center;"&gt;</text:p>
      <text:p text:style-name="Standard"><text:s text:c="14"/>&lt;button class="btn" id="btn-training-fight"&gt;¡COMENZAR ENTRENAMIENTO!&lt;/button&gt;</text:p>
      <text:p text:style-name="Standard"><text:soft-page-break/><text:s text:c="14"/>&lt;button class="btn small" id="btn-back-training" style="margin-top:10px;"&gt;← VOLVER AL MENÚ&lt;/button&gt;</text:p>
      <text:p text:style-name="Standard"><text:s text:c="10"/>&lt;/div&gt;</text:p>
      <text:p text:style-name="Standard"><text:s text:c="6"/>&lt;/div&gt;</text:p>
      <text:p text:style-name="Standard"/>
      <text:p text:style-name="Standard"><text:s text:c="6"/>&lt;!-- Indicador de controls --&gt;</text:p>
      <text:p text:style-name="Standard"><text:s text:c="6"/>&lt;div id="training-controls-hint" class="hidden" style="position:absolute; bottom:6px; left:0; width:100%; text-align:center; font-size:clamp(8px,1.4vw,11px); color:#cbd5f0aa; pointer-events:none;"&gt;</text:p>
      <text:p text:style-name="Standard"><text:s text:c="10"/>TÚ: A/D moverte · W saltar · F/G mantener = golpe cargado · H especial · S bloquear</text:p>
      <text:p text:style-name="Standard"><text:s text:c="6"/>&lt;/div&gt;</text:p>
      <text:p text:style-name="Standard"><text:s text:c="2"/>&lt;/div&gt;</text:p>
      <text:p text:style-name="Standard"/>
      <text:p text:style-name="Standard"><text:s text:c="2"/>Paso 4: Añadir lógica de entrenamiento</text:p>
      <text:p text:style-name="Standard"/>
      <text:p text:style-name="Standard"><text:s text:c="2"/>Busca donde se define la función startFight() (alrededor de línea 1643) y crea una función similar para entrenamiento:</text:p>
      <text:p text:style-name="Standard"/>
      <text:p text:style-name="Standard"><text:s text:c="2"/>function startTraining(){</text:p>
      <text:p text:style-name="Standard"><text:s text:c="6"/>// Configuración específica para entrenamiento</text:p>
      <text:p text:style-name="Standard"><text:s text:c="6"/>S.mode = 'training'; // Nuevo modo</text:p>
      <text:p text:style-name="Standard"><text:s text:c="6"/>S.p1Def = S.p1Def || CHARACTERS[0]; // Por defecto, primer personaje</text:p>
      <text:p text:style-name="Standard"><text:s text:c="6"/>S.p2Def = {</text:p>
      <text:p text:style-name="Standard"><text:s text:c="10"/>id: 'training_dummy',</text:p>
      <text:p text:style-name="Standard"><text:s text:c="10"/>name: 'Muñeco de Entrenamiento',</text:p>
      <text:p text:style-name="Standard"><text:s text:c="10"/>role: '',</text:p>
      <text:p text:style-name="Standard"><text:s text:c="10"/>img: 'javier', // Usamos Javier como base</text:p>
      <text:p text:style-name="Standard"><text:s text:c="10"/>color: '#10ac84',</text:p>
      <text:p text:style-name="Standard"><text:s text:c="10"/>special: 'N/A',</text:p>
      <text:p text:style-name="Standard"><text:s text:c="10"/>specialType: 'none',</text:p>
      <text:p text:style-name="Standard"><text:s text:c="10"/>h: 240</text:p>
      <text:p text:style-name="Standard"><text:s text:c="6"/>};</text:p>
      <text:p text:style-name="Standard"><text:s text:c="6"/>S.p2IsEnemy = false; // Siempre jugador vs jugador en entrenamiento</text:p>
      <text:p text:style-name="Standard"/>
      <text:p text:style-name="Standard"><text:s text:c="6"/>// Crear fighters con configuración de entrenamiento</text:p>
      <text:p text:style-name="Standard"><text:s text:c="6"/>const p1isEnemy = false;</text:p>
      <text:p text:style-name="Standard"><text:s text:c="6"/>const p2isEnemy = false;</text:p>
      <text:p text:style-name="Standard"><text:s text:c="6"/>S.fighters = [</text:p>
      <text:p text:style-name="Standard"><text:s text:c="10"/>makeFighter(S.p1Def, 200, 1, false, 0), // Jugador 1</text:p>
      <text:p text:style-name="Standard"><text:s text:c="10"/>makeFighter(S.p2Def, CANVAS_W-200-110, -1, false, 0) // Oponente</text:p>
      <text:p text:style-name="Standard"><text:s text:c="6"/>];</text:p>
      <text:p text:style-name="Standard"/>
      <text:p text:style-name="Standard"><text:s text:c="6"/>// Posicionar fighters</text:p>
      <text:p text:style-name="Standard"><text:s text:c="6"/>const [fp1, fp2] = S.fighters;</text:p>
      <text:p text:style-name="Standard"><text:s text:c="6"/>fp1.x = 200;</text:p>
      <text:p text:style-name="Standard"><text:s text:c="6"/>fp1.introTargetX = fp1.x;</text:p>
      <text:p text:style-name="Standard"><text:s text:c="6"/>fp2.x = CANVAS_W-200-110;</text:p>
      <text:p text:style-name="Standard"><text:s text:c="6"/>fp2.introTargetX = fp2.x;</text:p>
      <text:p text:style-name="Standard"/>
      <text:p text:style-name="Standard"><text:s text:c="6"/>// Estado inicial</text:p>
      <text:p text:style-name="Standard"><text:s text:c="6"/>S.fightPhase = 'fighting'; // Saltar intro para entrenamiento inmediato</text:p>
      <text:p text:style-name="Standard"><text:s text:c="6"/>S.timer = 999; // Tiempo prácticamente ilimitado</text:p>
      <text:p text:style-name="Standard"><text:soft-page-break/><text:s text:c="6"/>S.timerAcc = 0;</text:p>
      <text:p text:style-name="Standard"><text:s text:c="6"/>S.frame = 0;</text:p>
      <text:p text:style-name="Standard"><text:s text:c="6"/>S.particles = [];</text:p>
      <text:p text:style-name="Standard"><text:s text:c="6"/>S.projectiles = [];</text:p>
      <text:p text:style-name="Standard"/>
      <text:p text:style-name="Standard"><text:s text:c="6"/>// Actualizar HUD</text:p>
      <text:p text:style-name="Standard"><text:s text:c="6"/>document.getElementById('p1name').textContent = S.p1Def.name;</text:p>
      <text:p text:style-name="Standard"><text:s text:c="6"/>document.getElementById('p2name').textContent = S.p2Def.name;</text:p>
      <text:p text:style-name="Standard"/>
      <text:p text:style-name="Standard"><text:s text:c="6"/>// Hint de controls específico para entrenamiento</text:p>
      <text:p text:style-name="Standard"><text:s text:c="6"/>document.getElementById('training-controls-hint').textContent =</text:p>
      <text:p text:style-name="Standard"><text:s text:c="10"/>'ENTRENAMIENTO: A/D moverte · W saltar · F/G mantener = golpe cargado · H especial · S bloquear';</text:p>
      <text:p text:style-name="Standard"><text:s text:c="6"/>document.getElementById('training-controls-hint').classList.remove('hidden');</text:p>
      <text:p text:style-name="Standard"/>
      <text:p text:style-name="Standard"><text:s text:c="6"/>showScreen(null); // Mostrar canvas</text:p>
      <text:p text:style-name="Standard"><text:s text:c="6"/>S.running = true;</text:p>
      <text:p text:style-name="Standard"><text:s text:c="6"/>S.paused = false;</text:p>
      <text:p text:style-name="Standard"><text:s text:c="6"/>document.getElementById('pause-overlay').classList.add('hidden');</text:p>
      <text:p text:style-name="Standard"/>
      <text:p text:style-name="Standard"><text:s text:c="6"/>// Aplicar configuración de oponente basada en selección</text:p>
      <text:p text:style-name="Standard"><text:s text:c="6"/>applyTrainingOpponentConfig();</text:p>
      <text:p text:style-name="Standard"><text:s text:c="2"/>}</text:p>
      <text:p text:style-name="Standard"/>
      <text:p text:style-name="Standard"><text:s text:c="2"/>Paso 5: Añadir función de configuración de oponente</text:p>
      <text:p text:style-name="Standard"/>
      <text:p text:style-name="Standard"><text:s text:c="2"/>Después de startTraining(), agrega esta función que leerá las opciones del menú de entrenamiento:</text:p>
      <text:p text:style-name="Standard"/>
      <text:p text:style-name="Standard"><text:s text:c="2"/>function applyTrainingOpponentConfig(){</text:p>
      <text:p text:style-name="Standard"><text:s text:c="6"/>const opponentType = document.getElementById('training-opponent')?.value || 'static';</text:p>
      <text:p text:style-name="Standard"><text:s text:c="6"/>const debugHitboxes = document.getElementById('debug-hitboxes')?.checked || false;</text:p>
      <text:p text:style-name="Standard"><text:s text:c="6"/>const debugHurtboxes = document.getElementById('debug-hurtboxes')?.checked || false;</text:p>
      <text:p text:style-name="Standard"/>
      <text:p text:style-name="Standard"><text:s text:c="6"/>// Almacenar configuración en estado global para usar en el loop</text:p>
      <text:p text:style-name="Standard"><text:s text:c="6"/>S.trainingConfig = {</text:p>
      <text:p text:style-name="Standard"><text:s text:c="10"/>opponentType,</text:p>
      <text:p text:style-name="Standard"><text:s text:c="10"/>debugHitboxes,</text:p>
      <text:p text:style-name="Standard"><text:s text:c="10"/>debugHurtboxes,</text:p>
      <text:p text:style-name="Standard"><text:s text:c="10"/>showFrameData: document.getElementById('debug-frame-data')?.checked || false</text:p>
      <text:p text:style-name="Standard"><text:s text:c="6"/>};</text:p>
      <text:p text:style-name="Standard"/>
      <text:p text:style-name="Standard"><text:s text:c="6"/>// Configurar comportamiento inicial del oponente</text:p>
      <text:p text:style-name="Standard"><text:s text:c="6"/>if(opponentType === 'static'){</text:p>
      <text:p text:style-name="Standard"><text:s text:c="10"/>// Oponente no hace nada (ya está en estado idle por defecto)</text:p>
      <text:p text:style-name="Standard"><text:s text:c="6"/>} else if(opponentType === 'passive'){</text:p>
      <text:p text:style-name="Standard"><text:s text:c="10"/>// Bloquear ocasionalmente</text:p>
      <text:p text:style-name="Standard"><text:s text:c="10"/>setInterval(() =&gt; {</text:p>
      <text:p text:style-name="Standard"><text:s text:c="14"/>if(Math.random() &lt; 0.02 &amp;&amp; S.fighters[1] &amp;&amp; !S.fighters[1].frozen){</text:p>
      <text:p text:style-name="Standard"><text:s text:c="18"/>S.fighters[1].state = 'block';</text:p>
      <text:p text:style-name="Standard"><text:s text:c="18"/>S.fighters[1].stateTimer = 30;</text:p>
      <text:p text:style-name="Standard"><text:s text:c="14"/>}</text:p>
      <text:p text:style-name="Standard"><text:s text:c="10"/>}, 1000);</text:p>
      <text:p text:style-name="Standard"><text:soft-page-break/><text:s text:c="6"/>}</text:p>
      <text:p text:style-name="Standard"><text:s text:c="6"/>// Implementar otros tipos según necesites...</text:p>
      <text:p text:style-name="Standard"><text:s text:c="2"/>}</text:p>
      <text:p text:style-name="Standard"/>
      <text:p text:style-name="Standard"><text:s text:c="2"/>Paso 6: Modificar el loop principal para respetar el modo entrenamiento</text:p>
      <text:p text:style-name="Standard"/>
      <text:p text:style-name="Standard"><text:s text:c="2"/>Busca el loop() function (alrededor de línea 2796) y agrega condiciones para entrenamiento:</text:p>
      <text:p text:style-name="Standard"/>
      <text:p text:style-name="Standard"><text:s text:c="2"/>function loop(){</text:p>
      <text:p text:style-name="Standard"><text:s text:c="6"/>// Salir si no estamos en pelea o entrenamiento</text:p>
      <text:p text:style-name="Standard"><text:s text:c="6"/>if(S.screen!=='fight' &amp;&amp; S.screen!=='training'){}</text:p>
      <text:p text:style-name="Standard"/>
      <text:p text:style-name="Standard"><text:s text:c="6"/>// ... resto del loop existente ...</text:p>
      <text:p text:style-name="Standard"/>
      <text:p text:style-name="Standard"><text:s text:c="6"/>// Dentro de la sección de fighting, agregar lógica de entrenamiento</text:p>
      <text:p text:style-name="Standard"><text:s text:c="6"/>else if(S.running &amp;&amp; !S.paused &amp;&amp; (S.fightPhase==='fighting' || S.mode==='training')){</text:p>
      <text:p text:style-name="Standard"><text:s text:c="10"/>S.frame++;</text:p>
      <text:p text:style-name="Standard"><text:s text:c="10"/>const [f1,f2] = S.fighters;</text:p>
      <text:p text:style-name="Standard"/>
      <text:p text:style-name="Standard"><text:s text:c="10"/>let c1 = p1Controls();</text:p>
      <text:p text:style-name="Standard"><text:s text:c="10"/>let c2 = (S.mode==='1p') ? aiControls(f2,f1) : p2Controls();</text:p>
      <text:p text:style-name="Standard"/>
      <text:p text:style-name="Standard"><text:s text:c="10"/>// EN ENTRENAMIENTO, el oponente sigue reglas especiales</text:p>
      <text:p text:style-name="Standard"><text:s text:c="10"/>if(S.mode === 'training'){</text:p>
      <text:p text:style-name="Standard"><text:s text:c="14"/>c2 = getTrainingOpponentControls(f2, f1); // Nueva función</text:p>
      <text:p text:style-name="Standard"><text:s text:c="10"/>}</text:p>
      <text:p text:style-name="Standard"/>
      <text:p text:style-name="Standard"><text:s text:c="10"/>updateFighter(f1,f2,c1);</text:p>
      <text:p text:style-name="Standard"><text:s text:c="10"/>updateFighter(f2,f1,c2);</text:p>
      <text:p text:style-name="Standard"><text:s text:c="10"/>updateProjectiles();</text:p>
      <text:p text:style-name="Standard"><text:s text:c="10"/>updateParticles();</text:p>
      <text:p text:style-name="Standard"/>
      <text:p text:style-name="Standard"><text:s text:c="10"/>// ... resto del HUD, timer, win condition (ajustar para entrenamiento) ...</text:p>
      <text:p text:style-name="Standard"/>
      <text:p text:style-name="Standard"><text:s text:c="10"/>// En entrenamiento, no terminar por KO o timeout automáticamente</text:p>
      <text:p text:style-name="Standard"><text:s text:c="10"/>if(S.mode !== 'training'){</text:p>
      <text:p text:style-name="Standard"><text:s text:c="14"/>if(f1.hp&lt;=0 || f2.hp&lt;=0 || S.timer&lt;=0){</text:p>
      <text:p text:style-name="Standard"><text:s text:c="18"/>endRound(f1,f2);</text:p>
      <text:p text:style-name="Standard"><text:s text:c="14"/>}</text:p>
      <text:p text:style-name="Standard"><text:s text:c="10"/>} else {</text:p>
      <text:p text:style-name="Standard"><text:s text:c="14"/>// En entrenamiento, solo terminar si el jugador presiona un botón de salida</text:p>
      <text:p text:style-name="Standard"><text:s text:c="14"/>// (el timer sigue corriendo pero no causa fin de round)</text:p>
      <text:p text:style-name="Standard"><text:s text:c="10"/>}</text:p>
      <text:p text:style-name="Standard"><text:s text:c="6"/>}</text:p>
      <text:p text:style-name="Standard"><text:s text:c="6"/>// ... resto del loop (dibujado, etc.) ...</text:p>
      <text:p text:style-name="Standard"><text:s text:c="2"/>}</text:p>
      <text:p text:style-name="Standard"/>
      <text:p text:style-name="Standard"><text:s text:c="2"/>Paso 7: Añadir función de controls del oponente de entrenamiento</text:p>
      <text:p text:style-name="Standard"/>
      <text:p text:style-name="Standard"><text:s text:c="2"/>Después de aiControls(), agrega:</text:p>
      <text:p text:style-name="Standard"/>
      <text:p text:style-name="Standard"><text:s text:c="2"/>function getTrainingOpponentControls(f, opp){</text:p>
      <text:p text:style-name="Standard"><text:soft-page-break/><text:s text:c="6"/>const c = {left:false,right:false,jump:false,punch:false,kick:false,special:false,block:false};</text:p>
      <text:p text:style-name="Standard"/>
      <text:p text:style-name="Standard"><text:s text:c="6"/>if(!S.trainingConfig) return c; // Seguridad</text:p>
      <text:p text:style-name="Standard"/>
      <text:p text:style-name="Standard"><text:s text:c="6"/>switch(S.trainingConfig.opponentType){</text:p>
      <text:p text:style-name="Standard"><text:s text:c="10"/>case 'static':</text:p>
      <text:p text:style-name="Standard"><text:s text:c="14"/>// Oponente nunca hace nada</text:p>
      <text:p text:style-name="Standard"><text:s text:c="14"/>break;</text:p>
      <text:p text:style-name="Standard"/>
      <text:p text:style-name="Standard"><text:s text:c="10"/>case 'passive':</text:p>
      <text:p text:style-name="Standard"><text:s text:c="14"/>// Bloquear muy ocasionalmente</text:p>
      <text:p text:style-name="Standard"><text:s text:c="14"/>if(Math.random() &lt; 0.005 &amp;&amp; f.state !== 'block' &amp;&amp; !f.frozen){</text:p>
      <text:p text:style-name="Standard"><text:s text:c="18"/>c.block = true;</text:p>
      <text:p text:style-name="Standard"><text:s text:c="14"/>}</text:p>
      <text:p text:style-name="Standard"><text:s text:c="14"/>break;</text:p>
      <text:p text:style-name="Standard"/>
      <text:p text:style-name="Standard"><text:s text:c="10"/>case 'aggressive':</text:p>
      <text:p text:style-name="Standard"><text:s text:c="14"/>// Atacar aleatoriamente con diferentes tipos</text:p>
      <text:p text:style-name="Standard"><text:s text:c="14"/>const rand = Math.random();</text:p>
      <text:p text:style-name="Standard"><text:s text:c="14"/>if(rand &lt; 0.02) c.punch = true;</text:p>
      <text:p text:style-name="Standard"><text:s text:c="14"/>else if(rand &lt; 0.04) c.kick = true;</text:p>
      <text:p text:style-name="Standard"><text:s text:c="14"/>else if(rand &lt; 0.06 &amp;&amp; f.meter &gt;= 100) c.special = true;</text:p>
      <text:p text:style-name="Standard"><text:s text:c="14"/>else if(rand &lt; 0.08) c.jump = true;</text:p>
      <text:p text:style-name="Standard"><text:s text:c="14"/>break;</text:p>
      <text:p text:style-name="Standard"/>
      <text:p text:style-name="Standard"><text:s text:c="10"/>case 'mirror':</text:p>
      <text:p text:style-name="Standard"><text:s text:c="14"/>// Copiar lo que hace el jugador (con pequeño delay)</text:p>
      <text:p text:style-name="Standard"><text:s text:c="14"/>if(opp.state === 'punch' &amp;&amp; opp.stateTimer &gt; 10){</text:p>
      <text:p text:style-name="Standard"><text:s text:c="18"/>c.punch = true;</text:p>
      <text:p text:style-name="Standard"><text:s text:c="14"/>} else if(opp.state === 'kick' &amp;&amp; opp.stateTimer &gt; 10){</text:p>
      <text:p text:style-name="Standard"><text:s text:c="18"/>c.kick = true;</text:p>
      <text:p text:style-name="Standard"><text:s text:c="14"/>} else if(opp.state === 'special' &amp;&amp; opp.stateTimer &gt; 20){</text:p>
      <text:p text:style-name="Standard"><text:s text:c="18"/>c.special = true;</text:p>
      <text:p text:style-name="Standard"><text:s text:c="14"/>} else if(opp.state === 'jump'){</text:p>
      <text:p text:style-name="Standard"><text:s text:c="18"/>c.jump = true;</text:p>
      <text:p text:style-name="Standard"><text:s text:c="14"/>}</text:p>
      <text:p text:style-name="Standard"><text:s text:c="14"/>break;</text:p>
      <text:p text:style-name="Standard"><text:s text:c="6"/>}</text:p>
      <text:p text:style-name="Standard"/>
      <text:p text:style-name="Standard"><text:s text:c="6"/>return c;</text:p>
      <text:p text:style-name="Standard"><text:s text:c="2"/>}</text:p>
      <text:p text:style-name="Standard"/>
      <text:p text:style-name="Standard"><text:s text:c="2"/>Paso 8: Añadir manejadores para los botones de recarga</text:p>
      <text:p text:style-name="Standard"/>
      <text:p text:style-name="Standard"><text:s text:c="2"/>Después de los manejadores de pantalla (alrededor de línea 1530), agrega:</text:p>
      <text:p text:style-name="Standard"/>
      <text:p text:style-name="Standard"><text:s text:c="2"/>// Entrenamiento: recargar HP</text:p>
      <text:p text:style-name="Standard"><text:s text:c="2"/>document.getElementById('btn-refill-hp')?.addEventListener('click', ()=&gt;{</text:p>
      <text:p text:style-name="Standard"><text:s text:c="6"/>if(S.fighters &amp;&amp; S.fighters[0]){</text:p>
      <text:p text:style-name="Standard"><text:s text:c="10"/>S.fighters[0].hp = S.fighters[0].maxHp;</text:p>
      <text:p text:style-name="Standard"><text:s text:c="10"/>// Actualizar barra de HP visualmente</text:p>
      <text:p text:style-name="Standard"><text:s text:c="10"/>document.getElementById('p1hp').style.width = '100%';</text:p>
      <text:p text:style-name="Standard"><text:soft-page-break/><text:s text:c="10"/>document.getElementById('p1chip').style.width = '100%';</text:p>
      <text:p text:style-name="Standard"><text:s text:c="6"/>}</text:p>
      <text:p text:style-name="Standard"><text:s text:c="2"/>});</text:p>
      <text:p text:style-name="Standard"/>
      <text:p text:style-name="Standard"><text:s text:c="2"/>// Entrenamiento: recargar meter</text:p>
      <text:p text:style-name="Standard"><text:s text:c="2"/>document.getElementById('btn-refill-meter')?.addEventListener('click', ()=&gt;{</text:p>
      <text:p text:style-name="Standard"><text:s text:c="6"/>if(S.fighters &amp;&amp; S.fighters[0]){</text:p>
      <text:p text:style-name="Standard"><text:s text:c="10"/>S.fighters[0].meter = 100;</text:p>
      <text:p text:style-name="Standard"><text:s text:c="10"/>document.getElementById('p1sp').style.width = '100%';</text:p>
      <text:p text:style-name="Standard"><text:s text:c="6"/>}</text:p>
      <text:p text:style-name="Standard"><text:s text:c="2"/>});</text:p>
      <text:p text:style-name="Standard"/>
      <text:p text:style-name="Standard"><text:s text:c="2"/>// Entrenamiento: resetear posición</text:p>
      <text:p text:style-name="Standard"><text:s text:c="2"/>document.getElementById('btn-reset-position')?.addEventListener('click', ()=&gt;{</text:p>
      <text:p text:style-name="Standard"><text:s text:c="6"/>if(S.fighters.length &gt;= 2){</text:p>
      <text:p text:style-name="Standard"><text:s text:c="10"/>S.fighters[0].x = 200;</text:p>
      <text:p text:style-name="Standard"><text:s text:c="10"/>S.fighters[1].x = CANVAS_W-200-110;</text:p>
      <text:p text:style-name="Standard"><text:s text:c="10"/>S.fighters[0].vy = 0;</text:p>
      <text:p text:style-name="Standard"><text:s text:c="10"/>S.fighters[1].vy = 0;</text:p>
      <text:p text:style-name="Standard"><text:s text:c="10"/>S.fighters[0].y = 0;</text:p>
      <text:p text:style-name="Standard"><text:s text:c="10"/>S.fighters[1].y = 0;</text:p>
      <text:p text:style-name="Standard"><text:s text:c="6"/>}</text:p>
      <text:p text:style-name="Standard"><text:s text:c="2"/>});</text:p>
      <text:p text:style-name="Standard"/>
      <text:p text:style-name="Standard"><text:s text:c="2"/>// Entrenamiento: comenzar pelea</text:p>
      <text:p text:style-name="Standard"><text:s text:c="2"/>document.getElementById('btn-training-fight')?.addEventListener('click', startTraining);</text:p>
      <text:p text:style-name="Standard"/>
      <text:p text:style-name="Standard"><text:s text:c="2"/>// Entrenamiento: volver al menú</text:p>
      <text:p text:style-name="Standard"><text:s text:c="2"/>document.getElementById('btn-back-training')?.addEventListener('click', ()=&gt;{</text:p>
      <text:p text:style-name="Standard"><text:s text:c="6"/>S.fighters = [];</text:p>
      <text:p text:style-name="Standard"><text:s text:c="6"/>S.p1Meter = 0;</text:p>
      <text:p text:style-name="Standard"><text:s text:c="6"/>S.p2Meter = 0;</text:p>
      <text:p text:style-name="Standard"><text:s text:c="6"/>showScreen('screen-title');</text:p>
      <text:p text:style-name="Standard"><text:s text:c="2"/>});</text:p>
      <text:p text:style-name="Standard"/>
      <text:p text:style-name="Standard"><text:s text:c="2"/>Paso 9: Añadir visuales de debug (hitboxes/hurtboxes)</text:p>
      <text:p text:style-name="Standard"/>
      <text:p text:style-name="Standard"><text:s text:c="2"/>En la función drawFighter() (alrededor de línea 2514), antes del ctx.restore(); final, agrega:</text:p>
      <text:p text:style-name="Standard"/>
      <text:p text:style-name="Standard"><text:s text:c="2"/>// DIBUJADO DE DEBUG (solo en modo entrenamiento con checkboxes activos)</text:p>
      <text:p text:style-name="Standard"><text:s text:c="2"/>if(S.mode === 'training' &amp;&amp; S.trainingConfig){</text:p>
      <text:p text:style-name="Standard"><text:s text:c="6"/>const [f1, f2] = S.fighters;</text:p>
      <text:p text:style-name="Standard"><text:s text:c="6"/>const showHitboxes = S.trainingConfig.debugHitboxes;</text:p>
      <text:p text:style-name="Standard"><text:s text:c="6"/>const showHurtboxes = S.trainingConfig.debugHurtboxes;</text:p>
      <text:p text:style-name="Standard"/>
      <text:p text:style-name="Standard"><text:s text:c="6"/>[f1, f2].forEach((f, index) =&gt; {</text:p>
      <text:p text:style-name="Standard"><text:s text:c="10"/>if(!f) return;</text:p>
      <text:p text:style-name="Standard"/>
      <text:p text:style-name="Standard"><text:s text:c="10"/>// Hitbox (área que puede golpear)</text:p>
      <text:p text:style-name="Standard"><text:s text:c="10"/>if(showHitboxes &amp;&amp; f.state !== 'block' &amp;&amp; f.state !== 'hit'){</text:p>
      <text:p text:style-name="Standard"><text:s text:c="14"/>const hitboxSize = {</text:p>
      <text:p text:style-name="Standard"><text:s text:c="18"/>punch: {w: 30, h: 20, offsetX: f.facing===1 ? f.w-10 : -20, offsetY: f.h*0.3},</text:p>
      <text:p text:style-name="Standard"><text:soft-page-break/><text:s text:c="18"/>kick: {w: 40, h: 25, offsetX: f.facing===1 ? f.w-15 : -25, offsetY: f.h*0.4},</text:p>
      <text:p text:style-name="Standard"><text:s text:c="18"/>special: {w: 50, h: 30, offsetX: f.facing===1 ? f.w-20 : -30, offsetY: f.h*0.35},</text:p>
      <text:p text:style-name="Standard"><text:s text:c="18"/>default: {w: 20, h: 15, offsetX: 0, offsetY: f.h*0.2}</text:p>
      <text:p text:style-name="Standard"><text:s text:c="14"/>};</text:p>
      <text:p text:style-name="Standard"/>
      <text:p text:style-name="Standard"><text:s text:c="14"/>const box = hitboxSize[f.state] || hitboxSize.default;</text:p>
      <text:p text:style-name="Standard"><text:s text:c="14"/>ctx.save();</text:p>
      <text:p text:style-name="Standard"><text:s text:c="14"/>ctx.strokeStyle = index===0 ? '#00ff00' : '#ff0000'; // Verde P1, Rojo P2</text:p>
      <text:p text:style-name="Standard"><text:s text:c="14"/>ctx.lineWidth = 2;</text:p>
      <text:p text:style-name="Standard"><text:s text:c="14"/>ctx.strokeRect(</text:p>
      <text:p text:style-name="Standard"><text:s text:c="18"/>f.x + box.offsetX,</text:p>
      <text:p text:style-name="Standard"><text:s text:c="18"/>GROUND_Y - f.h + (f.y||0) + box.offsetY,</text:p>
      <text:p text:style-name="Standard"><text:s text:c="18"/>box.w,</text:p>
      <text:p text:style-name="Standard"><text:s text:c="18"/>box.h</text:p>
      <text:p text:style-name="Standard"><text:s text:c="14"/>);</text:p>
      <text:p text:style-name="Standard"><text:s text:c="14"/>ctx.restore();</text:p>
      <text:p text:style-name="Standard"><text:s text:c="10"/>}</text:p>
      <text:p text:style-name="Standard"/>
      <text:p text:style-name="Standard"><text:s text:c="10"/>// Hurtbox (área que puede recibir daño)</text:p>
      <text:p text:style-name="Standard"><text:s text:c="10"/>if(showHurtboxes){</text:p>
      <text:p text:style-name="Standard"><text:s text:c="14"/>ctx.save();</text:p>
      <text:p text:style-name="Standard"><text:s text:c="14"/>ctx.strokeStyle = '#ffff00'; // Amarillo</text:p>
      <text:p text:style-name="Standard"><text:s text:c="14"/>ctx.lineWidth = 1;</text:p>
      <text:p text:style-name="Standard"><text:s text:c="14"/>ctx.setLineDash([5, 3]);</text:p>
      <text:p text:style-name="Standard"><text:s text:c="14"/>ctx.strokeRect(f.x, GROUND_Y - f.h + (f.y||0), f.w, f.h);</text:p>
      <text:p text:style-name="Standard"><text:s text:c="14"/>ctx.restore();</text:p>
      <text:p text:style-name="Standard"><text:s text:c="10"/>}</text:p>
      <text:p text:style-name="Standard"><text:s text:c="6"/>});</text:p>
      <text:p text:style-name="Standard"><text:s text:c="2"/>}</text:p>
      <text:p text:style-name="Standard"/>
      <text:p text:style-name="Standard"><text:s text:c="2"/>✅ Beneficios del modo entrenamiento:</text:p>
      <text:p text:style-name="Standard"/>
      <text:p text:style-name="Standard"><text:s text:c="2"/>- Los jugadores pueden practicar combos sin presión</text:p>
      <text:p text:style-name="Standard"><text:s text:c="2"/>- Ideal para aprender timing de movimientos especiales</text:p>
      <text:p text:style-name="Standard"><text:s text:c="2"/>- Permite experimentar con diferentes personajes y escenarios</text:p>
      <text:p text:style-name="Standard"><text:s text:c="2"/>- Los visuales de debug ayudan a entender la mecánica del juego</text:p>
      <text:p text:style-name="Standard"><text:s text:c="2"/>- Totalmente opcional: no afecta al modo juego normal</text:p>
      <text:p text:style-name="Standard"/>
      <text:p text:style-name="Standard"><text:s text:c="2"/>📝 Notas de implementación:</text:p>
      <text:p text:style-name="Standard"/>
      <text:p text:style-name="Standard"><text:s text:c="2"/>1. Prueba cada sección por separado: primero agrega el botón y verifica que navega a la nueva pantalla</text:p>
      <text:p text:style-name="Standard"><text:s text:c="2"/>2. Luego implementa startTraining() y verifica que aparecen los fighters</text:p>
      <text:p text:style-name="Standard"><text:s text:c="2"/>3. Después agrega los controles de oponente y los botones de recarga</text:p>
      <text:p text:style-name="Standard"><text:s text:c="2"/>4. Finalmente, añade los visuales de debug</text:p>
      <text:p text:style-name="Standard"><text:s text:c="2"/>5. Los colores de los debug boxes se pueden ajustar en el código</text:p>
      <text:p text:style-name="Standard"/>
      <text:p text:style-name="Standard"><text:s text:c="2"/>---</text:p>
      <text:p text:style-name="Standard"><text:s text:c="2"/>3. ⚡ MEJORAS AL SISTEMA DE COMBO (MEJORA DE GAMEPLAY)</text:p>
      <text:p text:style-name="Standard"/>
      <text:p text:style-name="Standard"><text:s text:c="2"/>Problema: El sistema de combo actual es muy básico: solo cuenta hits consecutivos dentro de una ventana de tiempo fija (45 frames ≈ 0.75 segundos) y no tiene profundidad estratégica.</text:p>
      <text:p text:style-name="Standard"><text:soft-page-break/></text:p>
      <text:p text:style-name="Standard"><text:s text:c="2"/>Solución: Implementar un sistema de combo más sofisticado con:</text:p>
      <text:p text:style-name="Standard"><text:s text:c="2"/>- Diferentes tipos de combos (ligero, medio, pesado)</text:p>
      <text:p text:style-name="Standard"><text:s text:c="2"/>- Bonificaciones por variedad de ataques</text:p>
      <text:p text:style-name="Standard"><text:s text:c="2"/>- Sistema de "combo breaker" para el oponente</text:p>
      <text:p text:style-name="Standard"><text:s text:c="2"/>- Visuales y sonidos más elaborados</text:p>
      <text:p text:style-name="Standard"><text:s text:c="2"/>- Beneficios tácticos (recovery reduction, meter gain bonus)</text:p>
      <text:p text:style-name="Standard"/>
      <text:p text:style-name="Standard"><text:s text:c="2"/>Pasos a seguir:</text:p>
      <text:p text:style-name="Standard"/>
      <text:p text:style-name="Standard"><text:s text:c="2"/>Paso 1: Mejorar la estructura de datos del fighter</text:p>
      <text:p text:style-name="Standard"/>
      <text:p text:style-name="Standard"><text:s text:c="2"/>Busca donde se define makeFighter() (alrededor de línea 1611) y agrega propiedades de combo:</text:p>
      <text:p text:style-name="Standard"/>
      <text:p text:style-name="Standard"><text:s text:c="2"/>function makeFighter(def, x, facing, isEnemy, initialMeter){</text:p>
      <text:p text:style-name="Standard"><text:s text:c="6"/>// ... código existente ...</text:p>
      <text:p text:style-name="Standard"><text:s text:c="6"/>return {</text:p>
      <text:p text:style-name="Standard"><text:s text:c="10"/>// ... propiedades existentes ...</text:p>
      <text:p text:style-name="Standard"><text:s text:c="10"/>combo:0,</text:p>
      <text:p text:style-name="Standard"><text:s text:c="10"/>comboTimer:0,</text:p>
      <text:p text:style-name="Standard"><text:s text:c="10"/>maxCombo:0, // Para rastrear el combo más alto en la ronda</text:p>
      <text:p text:style-name="Standard"><text:s text:c="10"/>comboVariety:0, // Cuenta tipos diferentes de ataques en el combo</text:p>
      <text:p text:style-name="Standard"><text:s text:c="10"/>lastAttackType:null, // Para detectar variedad</text:p>
      <text:p text:style-name="Standard"><text:s text:c="10"/>comboDamageBonus:1.0, // Multiplicador de daño basado en combo</text:p>
      <text:p text:style-name="Standard"><text:s text:c="10"/>comboMeterBonus:0, // Meter extra ganado por combos altos</text:p>
      <text:p text:style-name="Standard"><text:s text:c="10"/>isInCombo:false, // Estado booleano para saber si está en combo</text:p>
      <text:p text:style-name="Standard"><text:s text:c="10"/>// ... resto de propiedades ...</text:p>
      <text:p text:style-name="Standard"><text:s text:c="6"/>};</text:p>
      <text:p text:style-name="Standard"><text:s text:c="2"/>}</text:p>
      <text:p text:style-name="Standard"/>
      <text:p text:style-name="Standard"><text:s text:c="2"/>Paso 2: Mejorar la lógica de detección de combos</text:p>
      <text:p text:style-name="Standard"/>
      <text:p text:style-name="Standard"><text:s text:c="2"/>En la función applyDamage() (alrededor de línea 1799 donde está el comentario /* ─── Combo tracking ─── */), reemplázala con:</text:p>
      <text:p text:style-name="Standard"/>
      <text:p text:style-name="Standard"><text:s text:c="2"/>/* ─── Combo tracking mejorado ─── */</text:p>
      <text:p text:style-name="Standard"><text:s text:c="2"/>if(d&gt;0 &amp;&amp; def.state!=='block'){</text:p>
      <text:p text:style-name="Standard"><text:s text:c="6"/>// Determinar tipo de ataque para variedad</text:p>
      <text:p text:style-name="Standard"><text:s text:c="6"/>let attackType = 'light';</text:p>
      <text:p text:style-name="Standard"><text:s text:c="6"/>if(opts.hitKind==='special') attackType = 'special';</text:p>
      <text:p text:style-name="Standard"><text:s text:c="6"/>else if(opts.hitKind==='heavy' || opts.hitKind==='jumpheavy') attackType = 'heavy';</text:p>
      <text:p text:style-name="Standard"><text:s text:c="6"/>else if(opts.hitKind==='jump') attackType = 'jump';</text:p>
      <text:p text:style-name="Standard"/>
      <text:p text:style-name="Standard"><text:s text:c="6"/>// Incrementar combo</text:p>
      <text:p text:style-name="Standard"><text:s text:c="6"/>att.combo = (att.combo||0) + 1;</text:p>
      <text:p text:style-name="Standard"><text:s text:c="6"/>att.comboTimer = 60; // Ventana aumentada a 1 segundo (60 frames)</text:p>
      <text:p text:style-name="Standard"/>
      <text:p text:style-name="Standard"><text:s text:c="6"/>// Tracking de variedad</text:p>
      <text:p text:style-name="Standard"><text:s text:c="6"/>if(att.lastAttackType !== attackType){</text:p>
      <text:p text:style-name="Standard"><text:s text:c="10"/>att.comboVariety = (att.comboVariety||0) + 1;</text:p>
      <text:p text:style-name="Standard"><text:s text:c="10"/>att.lastAttackType = attackType;</text:p>
      <text:p text:style-name="Standard"><text:s text:c="6"/>}</text:p>
      <text:p text:style-name="Standard"><text:soft-page-break/></text:p>
      <text:p text:style-name="Standard"><text:s text:c="6"/>// Bonificaciones por combo</text:p>
      <text:p text:style-name="Standard"><text:s text:c="6"/>att.comboDamageBonus = 1 + Math.min(att.combo * 0.03, 0.5); // +3% por hit, máx 50%</text:p>
      <text:p text:style-name="Standard"><text:s text:c="6"/>att.comboMeterBonus = Math.floor(att.combo / 5) * 5; // +5 meter cada 5 hits</text:p>
      <text:p text:style-name="Standard"/>
      <text:p text:style-name="Standard"><text:s text:c="6"/>// Resetear combo del defensor</text:p>
      <text:p text:style-name="Standard"><text:s text:c="6"/>def.combo = 0;</text:p>
      <text:p text:style-name="Standard"><text:s text:c="6"/>def.comboVariety = 0;</text:p>
      <text:p text:style-name="Standard"><text:s text:c="6"/>def.lastAttackType = null;</text:p>
      <text:p text:style-name="Standard"><text:s text:c="6"/>def.comboDamageBonus = 1;</text:p>
      <text:p text:style-name="Standard"><text:s text:c="6"/>def.comboMeterBonus = 0;</text:p>
      <text:p text:style-name="Standard"/>
      <text:p text:style-name="Standard"><text:s text:c="6"/>// Mostrar popup de combo si es significativo</text:p>
      <text:p text:style-name="Standard"><text:s text:c="6"/>if(att.combo &gt;= 3){</text:p>
      <text:p text:style-name="Standard"><text:s text:c="10"/>showComboPopup(att, att.combo, att.comboVariety);</text:p>
      <text:p text:style-name="Standard"><text:s text:c="6"/>}</text:p>
      <text:p text:style-name="Standard"/>
      <text:p text:style-name="Standard"><text:s text:c="6"/>// Aplicar bonificaciones de daño y meter al ataque actual</text:p>
      <text:p text:style-name="Standard"><text:s text:c="6"/>d *= att.comboDamageBonus;</text:p>
      <text:p text:style-name="Standard"><text:s text:c="6"/>att.meter = Math.min(100, att.meter + (opts.meterGain||0) + att.comboMeterBonus);</text:p>
      <text:p text:style-name="Standard"/>
      <text:p text:style-name="Standard"><text:s text:c="6"/>// ... resto de la función (particles, screen effects, etc.) ...</text:p>
      <text:p text:style-name="Standard"><text:s text:c="2"/>}</text:p>
      <text:p text:style-name="Standard"/>
      <text:p text:style-name="Standard"><text:s text:c="2"/>Paso 3: Mejorar el popup de combo</text:p>
      <text:p text:style-name="Standard"/>
      <text:p text:style-name="Standard"><text:s text:c="2"/>Busca la función showComboPopup() (alrededor de línea 1743) y reemplázala con:</text:p>
      <text:p text:style-name="Standard"/>
      <text:p text:style-name="Standard"><text:s text:c="2"/>/* ─── Combo popup mejorado ─── */</text:p>
      <text:p text:style-name="Standard"><text:s text:c="2"/>function showComboPopup(f, comboCount, varietyCount){</text:p>
      <text:p text:style-name="Standard"><text:s text:c="6"/>// Determinar texto y estilo basado en el combo</text:p>
      <text:p text:style-name="Standard"><text:s text:c="6"/>let label, sublabel, color, glow;</text:p>
      <text:p text:style-name="Standard"/>
      <text:p text:style-name="Standard"><text:s text:c="6"/>if(comboCount &gt;= 15){</text:p>
      <text:p text:style-name="Standard"><text:s text:c="10"/>label = comboCount + ' HITS!';</text:p>
      <text:p text:style-name="Standard"><text:s text:c="10"/>sublabel = '¡COMBO EXTREMO!';</text:p>
      <text:p text:style-name="Standard"><text:s text:c="10"/>color = '#ff00ff'; // Magenta</text:p>
      <text:p text:style-name="Standard"><text:s text:c="10"/>glow = '#800080';</text:p>
      <text:p text:style-name="Standard"><text:s text:c="6"/>} else if(comboCount &gt;= 10){</text:p>
      <text:p text:style-name="Standard"><text:s text:c="10"/>label = comboCount + ' HITS!';</text:p>
      <text:p text:style-name="Standard"><text:s text:c="10"/>sublabel = '¡COMBO MASIVO!';</text:p>
      <text:p text:style-name="Standard"><text:s text:c="10"/>color = '#ff0000'; // Rojo</text:p>
      <text:p text:style-name="Standard"><text:s text:c="10"/>glow = '#800000';</text:p>
      <text:p text:style-name="Standard"><text:s text:c="6"/>} else if(comboCount &gt;= 6){</text:p>
      <text:p text:style-name="Standard"><text:s text:c="10"/>label = comboCount + ' HITS!';</text:p>
      <text:p text:style-name="Standard"><text:s text:c="10"/>sublabel = '¡BUEN COMBO!';</text:p>
      <text:p text:style-name="Standard"><text:s text:c="10"/>color = '#ffff00'; // Amarillo</text:p>
      <text:p text:style-name="Standard"><text:s text:c="10"/>glow = '#808000';</text:p>
      <text:p text:style-name="Standard"><text:s text:c="6"/>} else if(comboCount &gt;= 3){</text:p>
      <text:p text:style-name="Standard"><text:s text:c="10"/>label = comboCount + ' HITS!';</text:p>
      <text:p text:style-name="Standard"><text:s text:c="10"/>sublabel = 'Combo';</text:p>
      <text:p text:style-name="Standard"><text:s text:c="10"/>color = '#ffd23f'; // Amarillo dorado (existente)</text:p>
      <text:p text:style-name="Standard"><text:soft-page-break/><text:s text:c="10"/>glow = '#ff8c42';</text:p>
      <text:p text:style-name="Standard"><text:s text:c="6"/>} else {</text:p>
      <text:p text:style-name="Standard"><text:s text:c="10"/>return; // No mostrar popup para combos muy bajos</text:p>
      <text:p text:style-name="Standard"><text:s text:c="6"/>}</text:p>
      <text:p text:style-name="Standard"/>
      <text:p text:style-name="Standard"><text:s text:c="6"/>// Añadar texto de variedad si es relevante</text:p>
      <text:p text:style-name="Standard"><text:s text:c="6"/>if(varietyCount &gt;= 3){</text:p>
      <text:p text:style-name="Standard"><text:s text:c="10"/>sublabel += ` (${varietyType} VARIEDAD)`;</text:p>
      <text:p text:style-name="Standard"><text:s text:c="6"/>}</text:p>
      <text:p text:style-name="Standard"/>
      <text:p text:style-name="Standard"><text:s text:c="6"/>S.particles.push({</text:p>
      <text:p text:style-name="Standard"><text:s text:c="10"/>type:'combo',</text:p>
      <text:p text:style-name="Standard"><text:s text:c="10"/>age:0,</text:p>
      <text:p text:style-name="Standard"><text:s text:c="10"/>life:50 + Math.min(comboCount*2, 50), // Vida más larga para combos altos</text:p>
      <text:p text:style-name="Standard"><text:s text:c="10"/>x:f.x+f.w/2,</text:p>
      <text:p text:style-name="Standard"><text:s text:c="10"/>y:GROUND_Y-f.h-30,</text:p>
      <text:p text:style-name="Standard"><text:s text:c="10"/>count:comboCount,</text:p>
      <text:p text:style-name="Standard"><text:s text:c="10"/>variety:varietyCount,</text:p>
      <text:p text:style-name="Standard"><text:s text:c="10"/>facing:f.facing,</text:p>
      <text:p text:style-name="Standard"><text:s text:c="10"/>label:label,</text:p>
      <text:p text:style-name="Standard"><text:s text:c="10"/>sublabel:sublabel,</text:p>
      <text:p text:style-name="Standard"><text:s text:c="10"/>color:color,</text:p>
      <text:p text:style-name="Standard"><text:s text:c="10"/>glow:glow</text:p>
      <text:p text:style-name="Standard"><text:s text:c="6"/>});</text:p>
      <text:p text:style-name="Standard"><text:s text:c="2"/>}</text:p>
      <text:p text:style-name="Standard"/>
      <text:p text:style-name="Standard"><text:s text:c="2"/>Paso 4: Mejorar el dibujado de popups de combo</text:p>
      <text:p text:style-name="Standard"/>
      <text:p text:style-name="Standard"><text:s text:c="2"/>Busca donde se dibuja el tipo combo en drawParticles() (alrededor de línea 2769) y reemplázalo con:</text:p>
      <text:p text:style-name="Standard"/>
      <text:p text:style-name="Standard"><text:s text:c="2"/>if(p.type==='combo'){</text:p>
      <text:p text:style-name="Standard"><text:s text:c="6"/>const fadeIn = Math.min(1, p.age/8);</text:p>
      <text:p text:style-name="Standard"><text:s text:c="6"/>const fadeOut = Math.max(0, Math.min(1, (p.life-p.age)/15));</text:p>
      <text:p text:style-name="Standard"><text:s text:c="6"/>const alpha = Math.min(fadeIn, fadeOut);</text:p>
      <text:p text:style-name="Standard"><text:s text:c="6"/>const popScale = p.age&lt;10 ? 0.5 + 0.5*(p.age/10) : 1;</text:p>
      <text:p text:style-name="Standard"><text:s text:c="6"/>const rise = -p.age*0.5;</text:p>
      <text:p text:style-name="Standard"/>
      <text:p text:style-name="Standard"><text:s text:c="6"/>ctx.globalAlpha = alpha;</text:p>
      <text:p text:style-name="Standard"><text:s text:c="6"/>ctx.textAlign='center';</text:p>
      <text:p text:style-name="Standard"><text:s text:c="6"/>ctx.translate(p.x, p.y+rise);</text:p>
      <text:p text:style-name="Standard"><text:s text:c="6"/>ctx.scale(popScale, popScale);</text:p>
      <text:p text:style-name="Standard"/>
      <text:p text:style-name="Standard"><text:s text:c="6"/>// Texto principal (número de hits)</text:p>
      <text:p text:style-name="Standard"><text:s text:c="6"/>ctx.font='bold 36px Bangers, sans-serif';</text:p>
      <text:p text:style-name="Standard"><text:s text:c="6"/>ctx.strokeStyle='#000';</text:p>
      <text:p text:style-name="Standard"><text:s text:c="6"/>ctx.lineWidth=5;</text:p>
      <text:p text:style-name="Standard"><text:s text:c="6"/>ctx.lineJoin='round';</text:p>
      <text:p text:style-name="Standard"><text:s text:c="6"/>ctx.strokeText(p.label, 0, 0);</text:p>
      <text:p text:style-name="Standard"><text:s text:c="6"/>ctx.fillStyle=p.color;</text:p>
      <text:p text:style-name="Standard"><text:s text:c="6"/>ctx.fillText(p.label, 0, 0);</text:p>
      <text:p text:style-name="Standard"/>
      <text:p text:style-name="Standard"><text:soft-page-break/><text:s text:c="6"/>// Subtexto (descripción)</text:p>
      <text:p text:style-name="Standard"><text:s text:c="6"/>ctx.font='bold 20px Fredoka, sans-serif';</text:p>
      <text:p text:style-name="Standard"><text:s text:c="6"/>ctx.strokeStyle='#000';</text:p>
      <text:p text:style-name="Standard"><text:s text:c="6"/>ctx.lineWidth=3;</text:p>
      <text:p text:style-name="Standard"><text:s text:c="6"/>ctx.strokeText(p.sublabel, 0, 28);</text:p>
      <text:p text:style-name="Standard"><text:s text:c="6"/>ctx.fillStyle='#fff';</text:p>
      <text:p text:style-name="Standard"><text:s text:c="6"/>ctx.fillText(p.sublabel, 0, 28);</text:p>
      <text:p text:style-name="Standard"/>
      <text:p text:style-name="Standard"><text:s text:c="6"/>// Indicador de variedad si aplica</text:p>
      <text:p text:style-name="Standard"><text:s text:c="6"/>if(p.variety &gt;= 3){</text:p>
      <text:p text:style-name="Standard"><text:s text:c="10"/>ctx.font='16px Bangers, sans-serif';</text:p>
      <text:p text:style-name="Standard"><text:s text:c="10"/>ctx.fillStyle=p.glow;</text:p>
      <text:p text:style-name="Standard"><text:s text:c="10"/>ctx.fillText('VARIEDAD: ' + p.variety, 0, 50);</text:p>
      <text:p text:style-name="Standard"><text:s text:c="6"/>}</text:p>
      <text:p text:style-name="Standard"/>
      <text:p text:style-name="Standard"><text:s text:c="6"/>ctx.restore();</text:p>
      <text:p text:style-name="Standard"><text:s text:c="2"/>}</text:p>
      <text:p text:style-name="Standard"/>
      <text:p text:style-name="Standard"><text:s text:c="2"/>Paso 5: Añadir beneficios tácticos de combos altos</text:p>
      <text:p text:style-name="Standard"/>
      <text:p text:style-name="Standard"><text:s text:c="2"/>En la función donde se aplica daño (applyDamage), después de calcular el daño final, agrega beneficios adicionales:</text:p>
      <text:p text:style-name="Standard"/>
      <text:p text:style-name="Standard"><text:s text:c="2"/>// Después de: def.hp = Math.max(0, def.hp - d);</text:p>
      <text:p text:style-name="Standard"/>
      <text:p text:style-name="Standard"><text:s text:c="2"/>// BENEFICIOS TÁCTICOS DE COMBO ALTO</text:p>
      <text:p text:style-name="Standard"><text:s text:c="2"/>if(att.combo &gt;= 8){</text:p>
      <text:p text:style-name="Standard"><text:s text:c="6"/>// Reducción de recovery time (el atacante se recupera más rápido)</text:p>
      <text:p text:style-name="Standard"><text:s text:c="6"/>att.stateTimer = Math.max(1, att.stateTimer - Math.floor(att.combo * 0.5));</text:p>
      <text:p text:style-name="Standard"/>
      <text:p text:style-name="Standard"><text:s text:c="6"/>// Posibilidad de hacer que el oponente se stunnee</text:p>
      <text:p text:style-name="Standard"><text:s text:c="6"/>if(Math.random() &lt; Math.min(att.combo * 0.02, 0.3)){ // 2% por hit, máx 30%</text:p>
      <text:p text:style-name="Standard"><text:s text:c="10"/>// Aplicar stun ligero al defensor</text:p>
      <text:p text:style-name="Standard"><text:s text:c="10"/>def.stunTimer = Math.min(def.stunTimer + 10, 30);</text:p>
      <text:p text:style-name="Standard"><text:s text:c="10"/>// Efecto visual</text:p>
      <text:p text:style-name="Standard"><text:s text:c="10"/>triggerScreenEffect('light');</text:p>
      <text:p text:style-name="Standard"><text:s text:c="10"/>addParticle({</text:p>
      <text:p text:style-name="Standard"><text:s text:c="14"/>x:def.x+def.w/2,</text:p>
      <text:p text:style-name="Standard"><text:s text:c="14"/>y:GROUND_Y-def.h*0.5,</text:p>
      <text:p text:style-name="Standard"><text:s text:c="14"/>type:'hit',</text:p>
      <text:p text:style-name="Standard"><text:s text:c="14"/>color:'#00ffff',</text:p>
      <text:p text:style-name="Standard"><text:s text:c="14"/>text:'¡STUN!',</text:p>
      <text:p text:style-name="Standard"><text:s text:c="14"/>life:20</text:p>
      <text:p text:style-name="Standard"><text:s text:c="10"/>});</text:p>
      <text:p text:style-name="Standard"><text:s text:c="6"/>}</text:p>
      <text:p text:style-name="Standard"><text:s text:c="2"/>}</text:p>
      <text:p text:style-name="Standard"/>
      <text:p text:style-name="Standard"><text:s text:c="2"/>// BONUS DE METER POR COMBO EXTREMO</text:p>
      <text:p text:style-name="Standard"><text:s text:c="2"/>if(att.combo &gt;= 12 &amp;&amp; att.combo % 4 === 0){ // Cada 4 hits después de 12</text:p>
      <text:p text:style-name="Standard"><text:s text:c="6"/>att.meter = Math.min(100, att.meter + 5);</text:p>
      <text:p text:style-name="Standard"><text:s text:c="6"/>// Efecto visual sutil</text:p>
      <text:p text:style-name="Standard"><text:s text:c="6"/>addParticle({</text:p>
      <text:p text:style-name="Standard"><text:soft-page-break/><text:s text:c="10"/>x:att.x+att.w/2,</text:p>
      <text:p text:style-name="Standard"><text:s text:c="10"/>y:GROUND_Y-att.h*0.3,</text:p>
      <text:p text:style-name="Standard"><text:s text:c="10"/>type:'hit',</text:p>
      <text:p text:style-name="Standard"><text:s text:c="10"/>color:'#ffd23f',</text:p>
      <text:p text:style-name="Standard"><text:s text:c="10"/>text:"+5 METER",</text:p>
      <text:p text:style-name="Standard"><text:s text:c="10"/>life:15</text:p>
      <text:p text:style-name="Standard"><text:s text:c="6"/>});</text:p>
      <text:p text:style-name="Standard"><text:s text:c="2"/>}</text:p>
      <text:p text:style-name="Standard"/>
      <text:p text:style-name="Standard"><text:s text:c="2"/>✅ Beneficios del sistema de combo mejorado:</text:p>
      <text:p text:style-name="Standard"/>
      <text:p text:style-name="Standard"><text:s text:c="2"/>- Más profundidad estratégica: Los jugadores deben variar sus ataques para maximizar combos</text:p>
      <text:p text:style-name="Standard"><text:s text:c="2"/>- Recompensa por habilidad: Combos altos dan ventajas tácticas reales</text:p>
      <text:p text:style-name="Standard"><text:s text:c="2"/>- Mejor feedback visual: Popups más informativos y espectaculares</text:p>
      <text:p text:style-name="Standard"><text:s text:c="2"/>- Encadena mejor: Los combos se sienten más merecidos y menos aleatorios</text:p>
      <text:p text:style-name="Standard"><text:s text:c="2"/>- Fomenta la creatividad: Los jugadores experimentarán con diferentes secuencias</text:p>
      <text:p text:style-name="Standard"/>
      <text:p text:style-name="Standard"><text:s text:c="2"/>📝 Notas de implementación:</text:p>
      <text:p text:style-name="Standard"/>
      <text:p text:style-name="Standard"><text:s text:c="2"/>1. Estos cambios son acumulativos: puedes implementarlos uno por uno</text:p>
      <text:p text:style-name="Standard"><text:s text:c="2"/>2. Prueba en el modo entrenamiento primero para ajustar valores</text:p>
      <text:p text:style-name="Standard"><text:s text:c="2"/>3. Los porcentajes y umbrales (como 0.03 de daño por hit) se pueden ajustar para balance</text:p>
      <text:p text:style-name="Standard"><text:s text:c="2"/>4. Considera añadir un sonido especial para combos altos (puedes reutilizar el motor de audio existente)</text:p>
      <text:p text:style-name="Standard"/>
      <text:p text:style-name="Standard"><text:s text:c="2"/>---</text:p>
      <text:p text:style-name="Standard"><text:s text:c="2"/>4. 🤖 IA MÁS INTELIGENTE (MEJORA DE GAMEPLAY)</text:p>
      <text:p text:style-name="Standard"/>
      <text:p text:style-name="Standard"><text:s text:c="2"/>Problema: La IA actual usa probabilidades simples basadas en distancia y no adapta su estilo al jugador.</text:p>
      <text:p text:style-name="Standard"/>
      <text:p text:style-name="Standard"><text:s text:c="2"/>Solución: Implementar una IA con:</text:p>
      <text:p text:style-name="Standard"><text:s text:c="2"/>- Máquina de estados finita (patrones de comportamiento)</text:p>
      <text:p text:style-name="Standard"><text:s text:c="2"/>- Adaptación al estilo de juego del jugador</text:p>
      <text:p text:style-name="Standard"><text:s text:c="2"/>- Juego psicológico (finteos, trampas)</text:p>
      <text:p text:style-name="Standard"><text:s text:c="2"/>- Gestión de recursos (meter, posicionamiento)</text:p>
      <text:p text:style-name="Standard"><text:s text:c="2"/>- Dificultad escalable que se siente justa</text:p>
      <text:p text:style-name="Standard"/>
      <text:p text:style-name="Standard"><text:s text:c="2"/>Pasos a seguir:</text:p>
      <text:p text:style-name="Standard"/>
      <text:p text:style-name="Standard"><text:s text:c="2"/>Paso 1: Reemplazar la función aiControls() por completo</text:p>
      <text:p text:style-name="Standard"/>
      <text:p text:style-name="Standard"><text:s text:c="2"/>Busca la función aiControls() (alrededor de línea 2086) y reemplázala con esta versión mejorada:</text:p>
      <text:p text:style-name="Standard"/>
      <text:p text:style-name="Standard"><text:s text:c="2"/>/* =================== IA MEJORADA =================== */</text:p>
      <text:p text:style-name="Standard"><text:s text:c="2"/>/*</text:p>
      <text:p text:style-name="Standard"><text:s text:c="5"/>IA basada en estados y adaptación al jugador.</text:p>
      <text:p text:style-name="Standard"><text:s text:c="5"/>Estados:</text:p>
      <text:p text:style-name="Standard"><text:s text:c="5"/>- AGGRESSIVE: Ataca frecuentemente</text:p>
      <text:p text:style-name="Standard"><text:s text:c="5"/>- DEFENSIVE: Bloquea y contraataca</text:p>
      <text:p text:style-name="Standard"><text:s text:c="5"/>- BAITING: Fintea para crear aberturas</text:p>
      <text:p text:style-name="Standard"><text:s text:c="5"/>- PUNISH: Castiga errores del jugador</text:p>
      <text:p text:style-name="Standard"><text:soft-page-break/><text:s text:c="5"/>- ZONING: Mantiene distancia con proyectiles</text:p>
      <text:p text:style-name="Standard"><text:s text:c="2"/>*/</text:p>
      <text:p text:style-name="Standard"><text:s text:c="2"/>function aiControls(f, opp){</text:p>
      <text:p text:style-name="Standard"><text:s text:c="6"/>const d = (opp.x+opp.w/2) - (f.x+f.w/2);</text:p>
      <text:p text:style-name="Standard"><text:s text:c="6"/>const ad = Math.abs(d);</text:p>
      <text:p text:style-name="Standard"><text:s text:c="6"/>const c = {left:false,right:false,jump:false,punch:false,kick:false,special:false,block:false};</text:p>
      <text:p text:style-name="Standard"/>
      <text:p text:style-name="Standard"><text:s text:c="6"/>// Inicializar estado de IA si no existe</text:p>
      <text:p text:style-name="Standard"><text:s text:c="6"/>if(!f.aiState){</text:p>
      <text:p text:style-name="Standard"><text:s text:c="10"/>f.aiState = {</text:p>
      <text:p text:style-name="Standard"><text:s text:c="14"/>current:'DEFENSIVE',</text:p>
      <text:p text:style-name="Standard"><text:s text:c="14"/>timer:0,</text:p>
      <text:p text:style-name="Standard"><text:s text:c="14"/>lastPlayerAction:null,</text:p>
      <text:p text:style-name="Standard"><text:s text:c="14"/>playerPattern:[], // Últimas 5 acciones del jugador</text:p>
      <text:p text:style-name="Standard"><text:s text:c="14"/>meterThreshold:50, // Cuando empezar a usar specials</text:p>
      <text:p text:style-name="Standard"><text:s text:c="14"/>aggression:0.3, <text:s text:c="2"/>// 0-1, cuán agresivo es</text:p>
      <text:p text:style-name="Standard"><text:s text:c="14"/>defense:0.7, <text:s text:c="5"/>// 0-1, cuán defensivo es</text:p>
      <text:p text:style-name="Standard"><text:s text:c="14"/>lastDecisionTime:0</text:p>
      <text:p text:style-name="Standard"><text:s text:c="10"/>};</text:p>
      <text:p text:style-name="Standard"><text:s text:c="6"/>}</text:p>
      <text:p text:style-name="Standard"/>
      <text:p text:style-name="Standard"><text:s text:c="6"/>const state = f.aiState;</text:p>
      <text:p text:style-name="Standard"/>
      <text:p text:style-name="Standard"><text:s text:c="6"/>// Actualizar timer de estado</text:p>
      <text:p text:style-name="Standard"><text:s text:c="6"/>state.timer++;</text:p>
      <text:p text:style-name="Standard"/>
      <text:p text:style-name="Standard"><text:s text:c="6"/>// Registrar acción reciente del jugador (cada 10 frames)</text:p>
      <text:p text:style-name="Standard"><text:s text:c="6"/>if(S.frame % 10 === 0){</text:p>
      <text:p text:style-name="Standard"><text:s text:c="10"/>const playerAction = getRecentPlayerAction(opp);</text:p>
      <text:p text:style-name="Standard"><text:s text:c="10"/>state.playerPattern.push(playerAction);</text:p>
      <text:p text:style-name="Standard"><text:s text:c="10"/>if(state.playerPattern.length &gt; 5) state.playerPattern.shift(); // Mantener solo últimos 5</text:p>
      <text:p text:style-name="Standard"/>
      <text:p text:style-name="Standard"><text:s text:c="10"/>// Adaptar comportamiento basado en patrón del jugador</text:p>
      <text:p text:style-name="Standard"><text:s text:c="10"/>adaptToPlayerPattern(state);</text:p>
      <text:p text:style-name="Standard"><text:s text:c="6"/>}</text:p>
      <text:p text:style-name="Standard"/>
      <text:p text:style-name="Standard"><text:s text:c="6"/>// Cambiar de estado basado en situación y timer</text:p>
      <text:p text:style-name="Standard"><text:s text:c="6"/>if(state.timer &gt; 180){ // Cada ~3 segundos</text:p>
      <text:p text:style-name="Standard"><text:s text:c="10"/>state.timer = 0;</text:p>
      <text:p text:style-name="Standard"><text:s text:c="10"/>state.current = chooseNextState(f, opp, ad, state);</text:p>
      <text:p text:style-name="Standard"><text:s text:c="6"/>}</text:p>
      <text:p text:style-name="Standard"/>
      <text:p text:style-name="Standard"><text:s text:c="6"/>// Ejecutar comportamiento basado en estado actual</text:p>
      <text:p text:style-name="Standard"><text:s text:c="6"/>switch(state.current){</text:p>
      <text:p text:style-name="Standard"><text:s text:c="10"/>case 'AGGRESSIVE':</text:p>
      <text:p text:style-name="Standard"><text:s text:c="14"/>return aggressiveAI(f, opp, ad, state);</text:p>
      <text:p text:style-name="Standard"><text:s text:c="10"/>case 'DEFENSIVE':</text:p>
      <text:p text:style-name="Standard"><text:s text:c="14"/>return defensiveAI(f, opp, ad, state);</text:p>
      <text:p text:style-name="Standard"><text:s text:c="10"/>case 'BAITING':</text:p>
      <text:p text:style-name="Standard"><text:s text:c="14"/>return baitingAI(f, opp, ad, state);</text:p>
      <text:p text:style-name="Standard"><text:s text:c="10"/>case 'PUNISH':</text:p>
      <text:p text:style-name="Standard"><text:s text:c="14"/>return punishAI(f, opp, ad, state);</text:p>
      <text:p text:style-name="Standard"><text:soft-page-break/><text:s text:c="10"/>case 'ZONING':</text:p>
      <text:p text:style-name="Standard"><text:s text:c="14"/>return zoningAI(f, opp, ad, state);</text:p>
      <text:p text:style-name="Standard"><text:s text:c="10"/>default:</text:p>
      <text:p text:style-name="Standard"><text:s text:c="14"/>return defensiveAI(f, opp, ad, state);</text:p>
      <text:p text:style-name="Standard"><text:s text:c="6"/>}</text:p>
      <text:p text:style-name="Standard"><text:s text:c="2"/>}</text:p>
      <text:p text:style-name="Standard"/>
      <text:p text:style-name="Standard"><text:s text:c="2"/>/* ─── Funciones auxiliares de IA ─── */</text:p>
      <text:p text:style-name="Standard"/>
      <text:p text:style-name="Standard"><text:s text:c="2"/>// Determinar la última acción significativa del jugador</text:p>
      <text:p text:style-name="Standard"><text:s text:c="2"/>function getRecentPlayerAction(fighter){</text:p>
      <text:p text:style-name="Standard"><text:s text:c="6"/>if(fighter.stateTimer &lt; 2){ // Acción recién iniciada</text:p>
      <text:p text:style-name="Standard"><text:s text:c="10"/>if(fighter.state === 'punch') return 'punch';</text:p>
      <text:p text:style-name="Standard"><text:s text:c="10"/>if(fighter.state === 'kick') return 'kick';</text:p>
      <text:p text:style-name="Standard"><text:s text:c="10"/>if(fighter.state === 'special') return 'special';</text:p>
      <text:p text:style-name="Standard"><text:s text:c="10"/>if(fighter.state === 'jump') return 'jump';</text:p>
      <text:p text:style-name="Standard"><text:s text:c="10"/>if(fighter.state === 'block') return 'block';</text:p>
      <text:p text:style-name="Standard"><text:s text:c="6"/>}</text:p>
      <text:p text:style-name="Standard"><text:s text:c="6"/>return 'idle';</text:p>
      <text:p text:style-name="Standard"><text:s text:c="2"/>}</text:p>
      <text:p text:style-name="Standard"/>
      <text:p text:style-name="Standard"><text:s text:c="2"/>// Adaptar el comportamiento de la IA basado en patrones del jugador</text:p>
      <text:p text:style-name="Standard"><text:s text:c="2"/>function adaptToPlayerPattern(state){</text:p>
      <text:p text:style-name="Standard"><text:s text:c="6"/>if(state.playerPattern.length &lt; 3) return;</text:p>
      <text:p text:style-name="Standard"/>
      <text:p text:style-name="Standard"><text:s text:c="6"/>// Contar frecuencias de acciones recientes</text:p>
      <text:p text:style-name="Standard"><text:s text:c="6"/>const counts = {punch:0, kick:0, special:0, jump:0, block:0, idle:0};</text:p>
      <text:p text:style-name="Standard"><text:s text:c="6"/>state.playerPattern.forEach(action =&gt; {</text:p>
      <text:p text:style-name="Standard"><text:s text:c="10"/>if(counts[action] !== undefined) counts[action]++;</text:p>
      <text:p text:style-name="Standard"><text:s text:c="6"/>});</text:p>
      <text:p text:style-name="Standard"/>
      <text:p text:style-name="Standard"><text:s text:c="6"/>// Si el jugador spammea un tipo de ataque, contrarrestarlo</text:p>
      <text:p text:style-name="Standard"><text:s text:c="6"/>const total = state.playerPattern.length;</text:p>
      <text:p text:style-name="Standard"><text:s text:c="6"/>if(counts.punch / total &gt; 0.4){</text:p>
      <text:p text:style-name="Standard"><text:s text:c="10"/>state.defense = Math.min(state.defense + 0.1, 0.9); // Bloquear más</text:p>
      <text:p text:style-name="Standard"><text:s text:c="10"/>state.aggression = Math.max(state.aggression - 0.05, 0.1);</text:p>
      <text:p text:style-name="Standard"><text:s text:c="6"/>}</text:p>
      <text:p text:style-name="Standard"><text:s text:c="6"/>if(counts.special / total &gt; 0.3){</text:p>
      <text:p text:style-name="Standard"><text:s text:c="10"/>state.meterThreshold = Math.max(state.meterThreshold - 10, 20); // Usar specials antes</text:p>
      <text:p text:style-name="Standard"><text:s text:c="6"/>}</text:p>
      <text:p text:style-name="Standard"><text:s text:c="6"/>if(counts.jump / total &gt; 0.35){</text:p>
      <text:p text:style-name="Standard"><text:s text:c="10"/>// El jugador salta mucho → usar más anti-aéreos</text:p>
      <text:p text:style-name="Standard"><text:s text:c="10"/>state.current = 'PUNISH'; // Cambiar a estado de castigo</text:p>
      <text:p text:style-name="Standard"><text:s text:c="6"/>}</text:p>
      <text:p text:style-name="Standard"><text:s text:c="2"/>}</text:p>
      <text:p text:style-name="Standard"/>
      <text:p text:style-name="Standard"><text:s text:c="2"/>// Elegir el próximo estado de la IA basado en la situación</text:p>
      <text:p text:style-name="Standard"><text:s text:c="2"/>function chooseNextState(f, opp, distance, state){</text:p>
      <text:p text:style-name="Standard"><text:s text:c="6"/>const meterRatio = f.meter / 100;</text:p>
      <text:p text:style-name="Standard"><text:s text:c="6"/>const hpRatio = f.hp / f.maxHp;</text:p>
      <text:p text:style-name="Standard"><text:s text:c="6"/>const oppHpRatio = opp.hp / opp.maxHp;</text:p>
      <text:p text:style-name="Standard"/>
      <text:p text:style-name="Standard"><text:soft-page-break/><text:s text:c="6"/>// Lógica de transición de estados</text:p>
      <text:p text:style-name="Standard"><text:s text:c="6"/>if(hpRatio &lt; 0.3){ // Bajo vida → ser más cuidadoso</text:p>
      <text:p text:style-name="Standard"><text:s text:c="10"/>return 'DEFENSIVE';</text:p>
      <text:p text:style-name="Standard"><text:s text:c="6"/>}</text:p>
      <text:p text:style-name="Standard"><text:s text:c="6"/>if(oppHpRatio &lt; 0.3){ // Oponente bajo vida → presionar para finir</text:p>
      <text:p text:style-name="Standard"><text:s text:c="10"/>return 'AGGRESSIVE';</text:p>
      <text:p text:style-name="Standard"><text:s text:c="6"/>}</text:p>
      <text:p text:style-name="Standard"><text:s text:c="6"/>if(meterRatio &gt; 0.8 &amp;&amp; distance &lt; 150){ // Meter lleno y cerca → oportunidad de special</text:p>
      <text:p text:style-name="Standard"><text:s text:c="10"/>return Math.random() &lt; 0.6 ? 'AGGRESSIVE' : 'PUNISH';</text:p>
      <text:p text:style-name="Standard"><text:s text:c="6"/>}</text:p>
      <text:p text:style-name="Standard"><text:s text:c="6"/>if(distance &gt; 200){ // Lejos → zoning con proyectiles</text:p>
      <text:p text:style-name="Standard"><text:s text:c="10"/>return 'ZONING';</text:p>
      <text:p text:style-name="Standard"><text:s text:c="6"/>}</text:p>
      <text:p text:style-name="Standard"><text:s text:c="6"/>if(state.playerPattern.join('').includes('specialspecial')){ // Jugador spamming specials</text:p>
      <text:p text:style-name="Standard"><text:s text:c="10"/>return 'BAITING'; // Fintear para hacerle whiff</text:p>
      <text:p text:style-name="Standard"><text:s text:c="6"/>}</text:p>
      <text:p text:style-name="Standard"><text:s text:c="6"/>// Por defecto, basado en agresividad actual</text:p>
      <text:p text:style-name="Standard"><text:s text:c="6"/>return Math.random() &lt; state.aggression ? 'AGGRESSIVE' : 'DEFENSIVE';</text:p>
      <text:p text:style-name="Standard"><text:s text:c="2"/>}</text:p>
      <text:p text:style-name="Standard"/>
      <text:p text:style-name="Standard"><text:s text:c="2"/>/* ─── Estados de IA específicos ─── */</text:p>
      <text:p text:style-name="Standard"/>
      <text:p text:style-name="Standard"><text:s text:c="2"/>function aggressiveAI(f, opp, ad, state){</text:p>
      <text:p text:style-name="Standard"><text:s text:c="6"/>const c = {left:false,right:false,jump:false,punch:false,kick:false,special:false,block:false};</text:p>
      <text:p text:style-name="Standard"/>
      <text:p text:style-name="Standard"><text:s text:c="6"/>// Movimiento basado en posición relativa</text:p>
      <text:p text:style-name="Standard"><text:s text:c="6"/>if(opp.x &lt; f.x){ c.right = true; } else { c.left = true; }</text:p>
      <text:p text:style-name="Standard"/>
      <text:p text:style-name="Standard"><text:s text:c="6"/>// Decisión de ataque basada en distancia y estado</text:p>
      <text:p text:style-name="Standard"><text:s text:c="6"/>if(ad &lt; 100){ // Cerca</text:p>
      <text:p text:style-name="Standard"><text:s text:c="10"/>if(Math.random() &lt; 0.35 * state.aggression){</text:p>
      <text:p text:style-name="Standard"><text:s text:c="14"/>if(Math.random() &lt; 0.5) c.punch = true;</text:p>
      <text:p text:style-name="Standard"><text:s text:c="14"/>else if(f.meter &gt;= state.meterThreshold * 100 &amp;&amp; Math.random() &lt; 0.4) c.special = true;</text:p>
      <text:p text:style-name="Standard"><text:s text:c="14"/>else c.kick = true;</text:p>
      <text:p text:style-name="Standard"><text:s text:c="10"/>}</text:p>
      <text:p text:style-name="Standard"><text:s text:c="10"/>// Ocasionalmente saltar para mezcla</text:p>
      <text:p text:style-name="Standard"><text:s text:c="10"/>if(Math.random() &lt; 0.1 * state.aggression) c.jump = true;</text:p>
      <text:p text:style-name="Standard"><text:s text:c="6"/>} else if(ad &lt; 200){ // Medio alcance</text:p>
      <text:p text:style-name="Standard"><text:s text:c="10"/>if(Math.random() &lt; 0.25 * state.aggression){</text:p>
      <text:p text:style-name="Standard"><text:s text:c="14"/>if(Math.random() &lt; 0.6) c.punch = true;</text:p>
      <text:p text:style-name="Standard"><text:s text:c="14"/>else c.kick = true;</text:p>
      <text:p text:style-name="Standard"><text:s text:c="10"/>}</text:p>
      <text:p text:style-name="Standard"><text:s text:c="6"/>}</text:p>
      <text:p text:style-name="Standard"/>
      <text:p text:style-name="Standard"><text:s text:c="6"/>// Bloqueo reactivo (menos que en defensive)</text:p>
      <text:p text:style-name="Standard"><text:s text:c="6"/>if(Math.random() &lt; 0.08 * (1 - state.aggression)) c.block = true;</text:p>
      <text:p text:style-name="Standard"/>
      <text:p text:style-name="Standard"><text:s text:c="6"/>return c;</text:p>
      <text:p text:style-name="Standard"><text:s text:c="2"/>}</text:p>
      <text:p text:style-name="Standard"/>
      <text:p text:style-name="Standard"><text:s text:c="2"/>function defensiveAI(f, opp, ad, state){</text:p>
      <text:p text:style-name="Standard"><text:s text:c="6"/>const c = {left:false,right:false,jump:false,punch:false,kick:false,special:false,block:false};</text:p>
      <text:p text:style-name="Standard"><text:soft-page-break/></text:p>
      <text:p text:style-name="Standard"><text:s text:c="6"/>// Mantener posición o moverse ligeramente</text:p>
      <text:p text:style-name="Standard"><text:s text:c="6"/>if(ad &gt; 150){ // Si estamos muy separados, acercarse</text:p>
      <text:p text:style-name="Standard"><text:s text:c="10"/>if(opp.x &lt; f.x){ c.right = true; } else { c.left = true; }</text:p>
      <text:p text:style-name="Standard"><text:s text:c="6"/>} else if(ad &lt; 50){ // Si estamos muy pegados, crear espacio</text:p>
      <text:p text:style-name="Standard"><text:s text:c="10"/>if(opp.x &lt; f.x){ c.left = true; } else { c.right = true; }</text:p>
      <text:p text:style-name="Standard"><text:s text:c="6"/>}</text:p>
      <text:p text:style-name="Standard"/>
      <text:p text:style-name="Standard"><text:s text:c="6"/>// Bloqueo proactivo alto</text:p>
      <text:p text:style-name="Standard"><text:s text:c="6"/>const blockChance = 0.25 * state.defense;</text:p>
      <text:p text:style-name="Standard"><text:s text:c="6"/>if(Math.random() &lt; blockChance) c.block = true;</text:p>
      <text:p text:style-name="Standard"/>
      <text:p text:style-name="Standard"><text:s text:c="6"/>// Contraataque después de bloquear exitoso (simplificado)</text:p>
      <text:p text:style-name="Standard"><text:s text:c="6"/>// En una implementación completa, tracking de bloqueos exitosos</text:p>
      <text:p text:style-name="Standard"><text:s text:c="6"/>if(f.state === 'block' &amp;&amp; f.stateTimer &gt; 10 &amp;&amp; Math.random() &lt; 0.15){</text:p>
      <text:p text:style-name="Standard"><text:s text:c="10"/>if(Math.random() &lt; 0.5) c.punch = true;</text:p>
      <text:p text:style-name="Standard"><text:s text:c="10"/>else c.kick = true;</text:p>
      <text:p text:style-name="Standard"><text:s text:c="6"/>}</text:p>
      <text:p text:style-name="Standard"/>
      <text:p text:style-name="Standard"><text:s text:c="6"/>// Usar special si tenemos meter y oponente está vulnerables</text:p>
      <text:p text:style-name="Standard"><text:s text:c="6"/>if(f.meter &gt;= state.meterThreshold * 100 &amp;&amp; ad &lt; 120 &amp;&amp; Math.random() &lt; 0.1 * state.aggression){</text:p>
      <text:p text:style-name="Standard"><text:s text:c="10"/>c.special = true;</text:p>
      <text:p text:style-name="Standard"><text:s text:c="6"/>}</text:p>
      <text:p text:style-name="Standard"/>
      <text:p text:style-name="Standard"><text:s text:c="6"/>return c;</text:p>
      <text:p text:style-name="Standard"><text:s text:c="2"/>}</text:p>
      <text:p text:style-name="Standard"/>
      <text:p text:style-name="Standard"><text:s text:c="2"/>function baitingAI(f, opp, ad, state){</text:p>
      <text:p text:style-name="Standard"><text:s text:c="6"/>const c = {left:false,right:false,jump:false,punch:false,kick:false,special:false,block:false};</text:p>
      <text:p text:style-name="Standard"/>
      <text:p text:style-name="Standard"><text:s text:c="6"/>// Fintear: moverse hacia adelante y atrás para provocar reacción</text:p>
      <text:p text:style-name="Standard"><text:s text:c="6"/>const baitPhase = (state.timer % 60) / 60; // 0-1 over 1 segundo</text:p>
      <text:p text:style-name="Standard"><text:s text:c="6"/>if(baitPhase &lt; 0.3){</text:p>
      <text:p text:style-name="Standard"><text:s text:c="10"/>c.right = true; // Avanzar</text:p>
      <text:p text:style-name="Standard"><text:s text:c="6"/>} else if(baitPhase &lt; 0.6){</text:p>
      <text:p text:style-name="Standard"><text:s text:c="10"/>c.left = true; // Retroceder</text:p>
      <text:p text:style-name="Standard"><text:s text:c="6"/>} else {</text:p>
      <text:p text:style-name="Standard"><text:s text:c="10"/>// En la fase final, atacar si el jugador reaccionó</text:p>
      <text:p text:style-name="Standard"><text:s text:c="10"/>if(ad &lt; 130 &amp;&amp; Math.random() &lt; 0.3){</text:p>
      <text:p text:style-name="Standard"><text:s text:c="14"/>if(Math.random() &lt; 0.5) c.punch = true;</text:p>
      <text:p text:style-name="Standard"><text:s text:c="14"/>else c.kick = true;</text:p>
      <text:p text:style-name="Standard"><text:s text:c="10"/>}</text:p>
      <text:p text:style-name="Standard"><text:s text:c="6"/>}</text:p>
      <text:p text:style-name="Standard"/>
      <text:p text:style-name="Standard"><text:s text:c="6"/>// Bloqueo moderado para protección</text:p>
      <text:p text:style-name="Standard"><text:s text:c="6"/>if(Math.random() &lt; 0.15) c.block = true;</text:p>
      <text:p text:style-name="Standard"/>
      <text:p text:style-name="Standard"><text:s text:c="6"/>return c;</text:p>
      <text:p text:style-name="Standard"><text:s text:c="2"/>}</text:p>
      <text:p text:style-name="Standard"/>
      <text:p text:style-name="Standard"><text:s text:c="2"/>function punishAI(f, opp, ad, state){</text:p>
      <text:p text:style-name="Standard"><text:soft-page-break/><text:s text:c="6"/>const c = {left:false,right:false,jump:false,punch:false,kick:false,special:false,block:false};</text:p>
      <text:p text:style-name="Standard"/>
      <text:p text:style-name="Standard"><text:s text:c="6"/>// Estado de castigo: reaccionar inmediatamente a acciones del jugador</text:p>
      <text:p text:style-name="Standard"><text:s text:c="6"/>// Necesitaríamos tracking de "whiffed attacks" del jugador</text:p>
      <text:p text:style-name="Standard"><text:s text:c="6"/>// Simplificación: si el jugador acaba de terminar un ataque y estamos en rango...</text:p>
      <text:p text:style-name="Standard"/>
      <text:p text:style-name="Standard"><text:s text:c="6"/>// Detectar si el jugador acaba de terminar un ataque (stateTimer alto en estado de ataque)</text:p>
      <text:p text:style-name="Standard"><text:s text:c="6"/>const justFinishedAttack =</text:p>
      <text:p text:style-name="Standard"><text:s text:c="10"/>(opp.state === 'punch' &amp;&amp; opp.stateTimer &gt; 15) ||</text:p>
      <text:p text:style-name="Standard"><text:s text:c="10"/>(opp.state === 'kick' &amp;&amp; opp.stateTimer &gt; 20) ||</text:p>
      <text:p text:style-name="Standard"><text:s text:c="10"/>(opp.state === 'special' &amp;&amp; opp.stateTimer &gt; 30);</text:p>
      <text:p text:style-name="Standard"/>
      <text:p text:style-name="Standard"><text:s text:c="6"/>if(justFinishedAttack &amp;&amp; ad &lt; 140){</text:p>
      <text:p text:style-name="Standard"><text:s text:c="10"/>// ¡Oportunidad de castigo!</text:p>
      <text:p text:style-name="Standard"><text:s text:c="10"/>if(Math.random() &lt; 0.5){</text:p>
      <text:p text:style-name="Standard"><text:s text:c="14"/>if(Math.random() &lt; 0.6) c.punch = true;</text:p>
      <text:p text:style-name="Standard"><text:s text:c="14"/>else c.kick = true;</text:p>
      <text:p text:style-name="Standard"><text:s text:c="10"/>} else if(Math.random() &lt; 0.3){</text:p>
      <text:p text:style-name="Standard"><text:s text:c="14"/>c.jump = true; // Anti-air si saltó</text:p>
      <text:p text:style-name="Standard"><text:s text:c="10"/>}</text:p>
      <text:p text:style-name="Standard"><text:s text:c="6"/>}</text:p>
      <text:p text:style-name="Standard"/>
      <text:p text:style-name="Standard"><text:s text:c="6"/>// Si no hay oportunidad, volver a defensive</text:p>
      <text:p text:style-name="Standard"><text:s text:c="6"/>if(!justFinishedAttack || ad &gt; 160){</text:p>
      <text:p text:style-name="Standard"><text:s text:c="10"/>return defensiveAI(f, opp, ad, state);</text:p>
      <text:p text:style-name="Standard"><text:s text:c="6"/>}</text:p>
      <text:p text:style-name="Standard"/>
      <text:p text:style-name="Standard"><text:s text:c="6"/>return c;</text:p>
      <text:p text:style-name="Standard"><text:s text:c="2"/>}</text:p>
      <text:p text:style-name="Standard"/>
      <text:p text:style-name="Standard"><text:s text:c="2"/>function zoningAI(f, opp, ad, state){</text:p>
      <text:p text:style-name="Standard"><text:s text:c="6"/>const c = {left:false,right:false,jump:false,punch:false,kick:false,special:false,block:false};</text:p>
      <text:p text:style-name="Standard"/>
      <text:p text:style-name="Standard"><text:s text:c="6"/>// Mantener distancia óptima para proyectiles (150-250px)</text:p>
      <text:p text:style-name="Standard"><text:s text:c="6"/>const idealZone = 200;</text:p>
      <text:p text:style-name="Standard"><text:s text:c="6"/>const zoneTolerance = 30;</text:p>
      <text:p text:style-name="Standard"/>
      <text:p text:style-name="Standard"><text:s text:c="6"/>if(ad &lt; idealZone - zoneTolerance){ // Demasiado cerca → retroceder</text:p>
      <text:p text:style-name="Standard"><text:s text:c="10"/>c.left = true;</text:p>
      <text:p text:style-name="Standard"><text:s text:c="6"/>} else if(ad &gt; idealZone + zoneTolerance){ // Demasiado lejos → avanzar</text:p>
      <text:p text:style-name="Standard"><text:s text:c="10"/>c.right = true;</text:p>
      <text:p text:style-name="Standard"><text:s text:c="6"/>}</text:p>
      <text:p text:style-name="Standard"><text:s text:c="6"/>// En la zona, mantener posición</text:p>
      <text:p text:style-name="Standard"/>
      <text:p text:style-name="Standard"><text:s text:c="6"/>// Usar proyectiles especiales si están disponibles</text:p>
      <text:p text:style-name="Standard"><text:s text:c="6"/>// Esto dependería de qué tipo de special tenga el personaje</text:p>
      <text:p text:style-name="Standard"><text:s text:c="6"/>// Simplificación: si tiene special tipo projectile y meter lleno</text:p>
      <text:p text:style-name="Standard"><text:s text:c="6"/>if(f.meter &gt;= 100 &amp;&amp;</text:p>
      <text:p text:style-name="Standard"><text:s text:c="9"/>(S.p2Def &amp;&amp; S.p2Def.specialType === 'projectile' ||</text:p>
      <text:p text:style-name="Standard"><text:s text:c="10"/>S.p1Def &amp;&amp; S.p1Def.specialType === 'projectile') &amp;&amp;</text:p>
      <text:p text:style-name="Standard"><text:s text:c="9"/>Math.random() &lt; 0.2){</text:p>
      <text:p text:style-name="Standard"><text:s text:c="10"/>c.special = true;</text:p>
      <text:p text:style-name="Standard"><text:soft-page-break/><text:s text:c="6"/>}</text:p>
      <text:p text:style-name="Standard"/>
      <text:p text:style-name="Standard"><text:s text:c="6"/>// Saltar ocasionalmente para evitar predecibilidad</text:p>
      <text:p text:style-name="Standard"><text:s text:c="6"/>if(Math.random() &lt; 0.05) c.jump = true;</text:p>
      <text:p text:style-name="Standard"/>
      <text:p text:style-name="Standard"><text:s text:c="6"/>return c;</text:p>
      <text:p text:style-name="Standard"><text:s text:c="2"/>}</text:p>
      <text:p text:style-name="Standard"/>
      <text:p text:style-name="Standard"><text:s text:c="2"/>Paso 2: Mejorar la función startFight() para reiniciar estado de IA</text:p>
      <text:p text:style-name="Standard"/>
      <text:p text:style-name="Standard"><text:s text:c="2"/>Al final de la función startFight() (alrededor de línea 1670), agrega:</text:p>
      <text:p text:style-name="Standard"/>
      <text:p text:style-name="Standard"><text:s text:c="2"/>// Reinicializar estado de IA para ambos fighters</text:p>
      <text:p text:style-name="Standard"><text:s text:c="2"/>if(S.fighters.length &gt;= 2){</text:p>
      <text:p text:style-name="Standard"><text:s text:c="6"/>S.fighters[0].aiState = null; // Reinicializará en el próximo llamado a aiControls</text:p>
      <text:p text:style-name="Standard"><text:s text:c="6"/>S.fighters[1].aiState = null;</text:p>
      <text:p text:style-name="Standard"><text:s text:c="2"/>}</text:p>
      <text:p text:style-name="Standard"/>
      <text:p text:style-name="Standard"><text:s text:c="2"/>✅ Beneficios de la IA mejorada:</text:p>
      <text:p text:style-name="Standard"/>
      <text:p text:style-name="Standard"><text:s text:c="2"/>- Más predecible pero inteligente: Los jugadores pueden aprender patrones y contraatacarlos</text:p>
      <text:p text:style-name="Standard"><text:s text:c="2"/>- Se adapta al jugador: Si siempre haces lo mismo, la IA aprenderá a contrarrestarlo</text:p>
      <text:p text:style-name="Standard"><text:s text:c="2"/>- Más variada en el estilo: Cambia entre agresivo, defensivo, finteando, etc.</text:p>
      <text:p text:style-name="Standard"><text:s text:c="2"/>- Gestiona mejor los recursos: Usa specials en momentos óptimos</text:p>
      <text:p text:style-name="Standard"><text:s text:c="2"/>- Se siente justa: No trampa, pero sí desafiante</text:p>
      <text:p text:style-name="Standard"><text:s text:c="2"/>- Más divertida de jugar contra: Cada partida se siente diferente</text:p>
      <text:p text:style-name="Standard"/>
      <text:p text:style-name="Standard"><text:s text:c="2"/>📝 Notas de implementación:</text:p>
      <text:p text:style-name="Standard"/>
      <text:p text:style-name="Standard"><text:s text:c="2"/>1. Esta es una IA sustancialmente más compleja - tómate tu tiempo para implementarla y probarla</text:p>
      <text:p text:style-name="Standard"><text:s text:c="2"/>2. Comienza con solo uno o dos estados (ej: AGGRESSIVE y DEFENSIVE) y añade los demás gradualmente</text:p>
      <text:p text:style-name="Standard"><text:s text:c="2"/>3. Ajusta los umbrales y probabilidades según cómo se sienta al jugar</text:p>
      <text:p text:style-name="Standard"><text:s text:c="2"/>4. Considera añadir "personalidades" de IA diferentes para distintos enemigos</text:p>
      <text:p text:style-name="Standard"><text:s text:c="2"/>5. Puedes hacer que ciertos enemigos tengan tendencias (ej: el "Impaciente" siempre es AGGRESSIVE)</text:p>
      <text:p text:style-name="Standard"/>
      <text:p text:style-name="Standard"><text:s text:c="2"/>---</text:p>
      <text:p text:style-name="Standard"><text:s text:c="2"/>5. ♿ OPCIONES DE ACCESIBILIDAD Y PULIDO (MEJORA DE UX)</text:p>
      <text:p text:style-name="Standard"/>
      <text:p text:style-name="Standard"><text:s text:c="2"/>Problema: El juego no tiene opciones para personalizar la experiencia según necesidades individuales o preferencias.</text:p>
      <text:p text:style-name="Standard"/>
      <text:p text:style-name="Standard"><text:s text:c="2"/>Solución: Añadir un menú de opciones con:</text:p>
      <text:p text:style-name="Standard"><text:s text:c="2"/>- Control de volumen separado (música vs efectos)</text:p>
      <text:p text:style-name="Standard"><text:s text:c="2"/>- Modo daltonismo</text:p>
      <text:p text:style-name="Standard"><text:s text:c="2"/>- Ajuste de sensibilidad de controles</text:p>
      <text:p text:style-name="Standard"><text:s text:c="2"/>- Opción de reducir efectos visuales intensos</text:p>
      <text:p text:style-name="Standard"><text:s text:c="2"/>- Indicadores visuales mejorados para golpes y parries</text:p>
      <text:p text:style-name="Standard"><text:s text:c="2"/>- Modo pantalla completa</text:p>
      <text:p text:style-name="Standard"/>
      <text:p text:style-name="Standard"><text:s text:c="2"/>Pasos a seguir:</text:p>
      <text:p text:style-name="Standard"><text:soft-page-break/></text:p>
      <text:p text:style-name="Standard"><text:s text:c="2"/>Paso 1: Añadir botón de opciones al menú título</text:p>
      <text:p text:style-name="Standard"/>
      <text:p text:style-name="Standard"><text:s text:c="2"/>Junto al botón de entrenamiento que añadiste antes, agrega:</text:p>
      <text:p text:style-name="Standard"/>
      <text:p text:style-name="Standard"><text:s text:c="2"/>&lt;button class="btn" id="title-btn-opciones"&gt;OPCIONES&lt;/button&gt;</text:p>
      <text:p text:style-name="Standard"/>
      <text:p text:style-name="Standard"><text:s text:c="2"/>Paso 2: Añadir manejador del botón de opciones</text:p>
      <text:p text:style-name="Standard"/>
      <text:p text:style-name="Standard"><text:s text:c="2"/>En la sección de manejadores de título, agrega:</text:p>
      <text:p text:style-name="Standard"/>
      <text:p text:style-name="Standard"><text:s text:c="2"/>document.getElementById('title-btn-opciones').onclick=()=&gt;{</text:p>
      <text:p text:style-name="Standard"><text:s text:c="6"/>startBgMusic();</text:p>
      <text:p text:style-name="Standard"><text:s text:c="6"/>AudioEngine.init();</text:p>
      <text:p text:style-name="Standard"><text:s text:c="6"/>AudioEngine.startMusic();</text:p>
      <text:p text:style-name="Standard"><text:s text:c="6"/>showScreen('screen-options'); // Nueva pantalla</text:p>
      <text:p text:style-name="Standard"><text:s text:c="2"/>};</text:p>
      <text:p text:style-name="Standard"/>
      <text:p text:style-name="Standard"><text:s text:c="2"/>Paso 3: Crear la pantalla de opciones</text:p>
      <text:p text:style-name="Standard"/>
      <text:p text:style-name="Standard"><text:s text:c="2"/>Añade esta HTML después de las demás pantallas:</text:p>
      <text:p text:style-name="Standard"/>
      <text:p text:style-name="Standard"><text:s text:c="2"/>&lt;!-- OPTIONS SCREEN --&gt;</text:p>
      <text:p text:style-name="Standard"><text:s text:c="2"/>&lt;div class="screen hidden" id="screen-options"&gt;</text:p>
      <text:p text:style-name="Standard"><text:s text:c="6"/>&lt;h1 class="title"&gt;OPCIONES&lt;/h1&gt;</text:p>
      <text:p text:style-name="Standard"/>
      <text:p text:style-name="Standard"><text:s text:c="6"/>&lt;div style="background:rgba(0,0,0,0.5); padding:25px; border-radius:12px; margin:30px auto; max-width:450px;"&gt;</text:p>
      <text:p text:style-name="Standard"><text:s text:c="10"/>&lt;!-- Volumen --&gt;</text:p>
      <text:p text:style-name="Standard"><text:s text:c="10"/>&lt;div style="margin:20px 0;"&gt;</text:p>
      <text:p text:style-name="Standard"><text:s text:c="14"/>&lt;h2 style="color:var(--accent2); text-align:center;"&gt;Volumen&lt;/h2&gt;</text:p>
      <text:p text:style-name="Standard"><text:s text:c="14"/>&lt;div style="display:flex; flex-direction:column; gap:15px;"&gt;</text:p>
      <text:p text:style-name="Standard"><text:s text:c="18"/>&lt;div&gt;</text:p>
      <text:p text:style-name="Standard"><text:s text:c="22"/>&lt;label style="display:block; margin-bottom:5px; color:var(--cream);"&gt;Música de fondo:&lt;/label&gt;</text:p>
      <text:p text:style-name="Standard"><text:s text:c="22"/>&lt;input type="range" id="music-volume" min="0" max="100" value="70" style="width:100%;"&gt;</text:p>
      <text:p text:style-name="Standard"><text:s text:c="22"/>&lt;div style="text-align:right; font-size:14px; color:var(--cream);" id="music-volume-value"&gt;70%&lt;/div&gt;</text:p>
      <text:p text:style-name="Standard"><text:s text:c="18"/>&lt;/div&gt;</text:p>
      <text:p text:style-name="Standard"><text:s text:c="18"/>&lt;div&gt;</text:p>
      <text:p text:style-name="Standard"><text:s text:c="22"/>&lt;label style="display:block; margin-bottom:5px; color:var(--cream);"&gt;Efectos de sonido:&lt;/label&gt;</text:p>
      <text:p text:style-name="Standard"><text:s text:c="22"/>&lt;input type="range" id="sfx-volume" min="0" max="100" value="80" style="width:100%;"&gt;</text:p>
      <text:p text:style-name="Standard"><text:s text:c="22"/>&lt;div style="text-align:right; font-size:14px; color:var(--cream);" id="sfx-volume-value"&gt;80%&lt;/div&gt;</text:p>
      <text:p text:style-name="Standard"><text:s text:c="18"/>&lt;/div&gt;</text:p>
      <text:p text:style-name="Standard"><text:s text:c="14"/>&lt;/div&gt;</text:p>
      <text:p text:style-name="Standard"><text:s text:c="10"/>&lt;/div&gt;</text:p>
      <text:p text:style-name="Standard"/>
      <text:p text:style-name="Standard"><text:s text:c="10"/>&lt;!-- Accesibilidad --&gt;</text:p>
      <text:p text:style-name="Standard"><text:soft-page-break/><text:s text:c="10"/>&lt;div style="margin:20px 0;"&gt;</text:p>
      <text:p text:style-name="Standard"><text:s text:c="14"/>&lt;h2 style="color:var(--accent2); text-align:center;"&gt;Accesibilidad&lt;/h2&gt;</text:p>
      <text:p text:style-name="Standard"><text:s text:c="14"/>&lt;div style="display:flex; flex-direction:column; gap:12px;"&gt;</text:p>
      <text:p text:style-name="Standard"><text:s text:c="18"/>&lt;label style="color:var(--cream); display:flex; align-items:center; gap:10px;"&gt;</text:p>
      <text:p text:style-name="Standard"><text:s text:c="22"/>&lt;input type="checkbox" id="colorblind-mode"&gt;</text:p>
      <text:p text:style-name="Standard"><text:s text:c="22"/>&lt;span&gt;Modo daltonismo (mejor contraste)&lt;/span&gt;</text:p>
      <text:p text:style-name="Standard"><text:s text:c="18"/>&lt;/label&gt;</text:p>
      <text:p text:style-name="Standard"><text:s text:c="18"/>&lt;label style="color:var(--cream); display:flex; align-items:center; gap:10px;"&gt;</text:p>
      <text:p text:style-name="Standard"><text:s text:c="22"/>&lt;input type="checkbox" id="reduce-effects"&gt;</text:p>
      <text:p text:style-name="Standard"><text:s text:c="22"/>&lt;span&gt;Reducir efectos visuales intensos&lt;/span&gt;</text:p>
      <text:p text:style-name="Standard"><text:s text:c="18"/>&lt;/label&gt;</text:p>
      <text:p text:style-name="Standard"><text:s text:c="18"/>&lt;label style="color:var(--cream); display:flex; align-items:center; gap:10px;"&gt;</text:p>
      <text:p text:style-name="Standard"><text:s text:c="22"/>&lt;input type="checkbox" id="hitbox-indicators"&gt;</text:p>
      <text:p text:style-name="Standard"><text:s text:c="22"/>&lt;span&gt;Mostrar indicadores de golpe/parry&lt;/span&gt;</text:p>
      <text:p text:style-name="Standard"><text:s text:c="18"/>&lt;/label&gt;</text:p>
      <text:p text:style-name="Standard"><text:s text:c="18"/>&lt;label style="color:var(--cream); display:flex; align-items:center; gap:10px;"&gt;</text:p>
      <text:p text:style-name="Standard"><text:s text:c="22"/>&lt;input type="checkbox" id="hold-to-block"&gt;</text:p>
      <text:p text:style-name="Standard"><text:s text:c="22"/>&lt;span&gt;Mantener presionado para bloquear (en lugar de toggle)&lt;/span&gt;</text:p>
      <text:p text:style-name="Standard"><text:s text:c="18"/>&lt;/label&gt;</text:p>
      <text:p text:style-name="Standard"><text:s text:c="14"/>&lt;/div&gt;</text:p>
      <text:p text:style-name="Standard"><text:s text:c="10"/>&lt;/div&gt;</text:p>
      <text:p text:style-name="Standard"/>
      <text:p text:style-name="Standard"><text:s text:c="10"/>&lt;!-- Juego --&gt;</text:p>
      <text:p text:style-name="Standard"><text:s text:c="10"/>&lt;div style="margin:20px 0;"&gt;</text:p>
      <text:p text:style-name="Standard"><text:s text:c="14"/>&lt;h2 style="color:var(--accent2); text-align:center;"&gt;Juego&lt;/h2&gt;</text:p>
      <text:p text:style-name="Standard"><text:s text:c="14"/>&lt;div style="display:flex; flex-direction:column; gap:12px;"&gt;</text:p>
      <text:p text:style-name="Standard"><text:s text:c="18"/>&lt;label style="color:var(--cream); display:flex; align-items:center; gap:10px;"&gt;</text:p>
      <text:p text:style-name="Standard"><text:s text:c="22"/>&lt;input type="checkbox" id="show-frame-data"&gt;</text:p>
      <text:p text:style-name="Standard"><text:s text:c="22"/>&lt;span&gt;Mostrar datos de frame (avanzado)&lt;/span&gt;</text:p>
      <text:p text:style-name="Standard"><text:s text:c="18"/>&lt;/label&gt;</text:p>
      <text:p text:style-name="Standard"><text:s text:c="18"/>&lt;label style="color:var(--cream); display:flex; align-items:center; gap:10px;"&gt;</text:p>
      <text:p text:style-name="Standard"><text:s text:c="22"/>&lt;input type="checkbox" id="hit-sound-volume"&gt;</text:p>
      <text:p text:style-name="Standard"><text:s text:c="22"/>&lt;span&gt;Aumentar volumen de golpes críticos&lt;/span&gt;</text:p>
      <text:p text:style-name="Standard"><text:s text:c="18"/>&lt;/label&gt;</text:p>
      <text:p text:style-name="Standard"><text:s text:c="18"/>&lt;label style="color:var(--cream); display:flex; align-items:center; gap:10px;"&gt;</text:p>
      <text:p text:style-name="Standard"><text:s text:c="22"/>&lt;input type="checkbox" id="auto-center"&gt;</text:p>
      <text:p text:style-name="Standard"><text:s text:c="22"/>&lt;span&gt;Centrar automáticamente después de combos&lt;/span&gt;</text:p>
      <text:p text:style-name="Standard"><text:s text:c="18"/>&lt;/label&gt;</text:p>
      <text:p text:style-name="Standard"><text:s text:c="14"/>&lt;/div&gt;</text:p>
      <text:p text:style-name="Standard"><text:s text:c="10"/>&lt;/div&gt;</text:p>
      <text:p text:style-name="Standard"/>
      <text:p text:style-name="Standard"><text:s text:c="10"/>&lt;!-- Pantalla --&gt;</text:p>
      <text:p text:style-name="Standard"><text:s text:c="10"/>&lt;div style="margin:20px 0;"&gt;</text:p>
      <text:p text:style-name="Standard"><text:s text:c="14"/>&lt;h2 style="color:var(--accent2); text-align:center;"&gt;Pantalla&lt;/h2&gt;</text:p>
      <text:p text:style-name="Standard"><text:s text:c="14"/>&lt;div style="display:flex; gap:15px; justify-content:center; flex-wrap:wrap;"&gt;</text:p>
      <text:p text:style-name="Standard"><text:s text:c="18"/>&lt;button class="btn" id="btn-toggle-fullscreen"&gt;PANTALLA COMPLETA&lt;/button&gt;</text:p>
      <text:p text:style-name="Standard"><text:s text:c="18"/>&lt;button class="btn small" id="btn-reset-options" style="margin-top:10px;"&gt;RESTAURAR POR DEFECTO&lt;/button&gt;</text:p>
      <text:p text:style-name="Standard"><text:s text:c="14"/>&lt;/div&gt;</text:p>
      <text:p text:style-name="Standard"><text:s text:c="10"/>&lt;/div&gt;</text:p>
      <text:p text:style-name="Standard"/>
      <text:p text:style-name="Standard"><text:s text:c="10"/>&lt;!-- Botón de volver --&gt;</text:p>
      <text:p text:style-name="Standard"><text:soft-page-break/><text:s text:c="10"/>&lt;div style="text-align:center; margin-top:25px;"&gt;</text:p>
      <text:p text:style-name="Standard"><text:s text:c="14"/>&lt;button class="btn small" id="btn-back-options"&gt;← VOLVER AL MENÚ&lt;/button&gt;</text:p>
      <text:p text:style-name="Standard"><text:s text:c="10"/>&lt;/div&gt;</text:p>
      <text:p text:style-name="Standard"><text:s text:c="6"/>&lt;/div&gt;</text:p>
      <text:p text:style-name="Standard"><text:s text:c="2"/>&lt;/div&gt;</text:p>
      <text:p text:style-name="Standard"/>
      <text:p text:style-name="Standard"><text:s text:c="2"/>Paso 4: Añadir lógica de guardado y aplicación de opciones</text:p>
      <text:p text:style-name="Standard"/>
      <text:p text:style-name="Standard"><text:s text:c="2"/>Después de los manejadores de pantalla, agrega este código para guardar opciones en localStorage:</text:p>
      <text:p text:style-name="Standard"/>
      <text:p text:style-name="Standard"><text:s text:c="2"/>/* =================== SISTEMA DE OPCIONES =================== */</text:p>
      <text:p text:style-name="Standard"><text:s text:c="2"/>const DEFAULT_OPTIONS = {</text:p>
      <text:p text:style-name="Standard"><text:s text:c="6"/>musicVolume: 70,</text:p>
      <text:p text:style-name="Standard"><text:s text:c="6"/>sfxVolume: 80,</text:p>
      <text:p text:style-name="Standard"><text:s text:c="6"/>colorblindMode: false,</text:p>
      <text:p text:style-name="Standard"><text:s text:c="6"/>reduceEffects: false,</text:p>
      <text:p text:style-name="Standard"><text:s text:c="6"/>hitboxIndicators: false,</text:p>
      <text:p text:style-name="Standard"><text:s text:c="6"/>holdToBlock: false,</text:p>
      <text:p text:style-name="Standard"><text:s text:c="6"/>showFrameData: false,</text:p>
      <text:p text:style-name="Standard"><text:s text:c="6"/>hitSoundVolumeBoost: false,</text:p>
      <text:p text:style-name="Standard"><text:s text:c="6"/>autoCenterAfterCombo: false</text:p>
      <text:p text:style-name="Standard"><text:s text:c="2"/>};</text:p>
      <text:p text:style-name="Standard"/>
      <text:p text:style-name="Standard"><text:s text:c="2"/>// Cargar opciones al inicio</text:p>
      <text:p text:style-name="Standard"><text:s text:c="2"/>function loadOptions(){</text:p>
      <text:p text:style-name="Standard"><text:s text:c="6"/>const saved = localStorage.getItem('codegraFightersOptions');</text:p>
      <text:p text:style-name="Standard"><text:s text:c="6"/>if(saved){</text:p>
      <text:p text:style-name="Standard"><text:s text:c="10"/>try{</text:p>
      <text:p text:style-name="Standard"><text:s text:c="14"/>return {...DEFAULT_OPTIONS, ...JSON.parse(saved)};</text:p>
      <text:p text:style-name="Standard"><text:s text:c="10"/>}catch(e){</text:p>
      <text:p text:style-name="Standard"><text:s text:c="14"/>console.error("Error al parsear opciones guardadas:", e);</text:p>
      <text:p text:style-name="Standard"><text:s text:c="14"/>return DEFAULT_OPTIONS;</text:p>
      <text:p text:style-name="Standard"><text:s text:c="10"/>}</text:p>
      <text:p text:style-name="Standard"><text:s text:c="6"/>}</text:p>
      <text:p text:style-name="Standard"><text:s text:c="6"/>return {...DEFAULT_OPTIONS};</text:p>
      <text:p text:style-name="Standard"><text:s text:c="2"/>}</text:p>
      <text:p text:style-name="Standard"/>
      <text:p text:style-name="Standard"><text:s text:c="2"/>function saveOptions(options){</text:p>
      <text:p text:style-name="Standard"><text:s text:c="6"/>try{</text:p>
      <text:p text:style-name="Standard"><text:s text:c="10"/>localStorage.setItem('codegraFightersOptions', JSON.stringify(options));</text:p>
      <text:p text:style-name="Standard"><text:s text:c="6"/>}catch(e){</text:p>
      <text:p text:style-name="Standard"><text:s text:c="10"/>console.error("Error al guardar opciones:", e);</text:p>
      <text:p text:style-name="Standard"><text:s text:c="6"/>}</text:p>
      <text:p text:style-name="Standard"><text:s text:c="2"/>}</text:p>
      <text:p text:style-name="Standard"/>
      <text:p text:style-name="Standard"><text:s text:c="2"/>function applyOptions(options){</text:p>
      <text:p text:style-name="Standard"><text:s text:c="6"/>// Aplicar volúmenes</text:p>
      <text:p text:style-name="Standard"><text:s text:c="6"/>if(options.musicVolume !== undefined){</text:p>
      <text:p text:style-name="Standard"><text:s text:c="10"/>const audioBg = document.getElementById('audio-bg');</text:p>
      <text:p text:style-name="Standard"><text:s text:c="10"/>if(audioBg) audioBg.volume = options.musicVolume / 100;</text:p>
      <text:p text:style-name="Standard"><text:s text:c="10"/>// También aplicar a sonidos sintetizados si es posible</text:p>
      <text:p text:style-name="Standard"><text:s text:c="10"/>// (requiere modificar el AudioEngine para aceptar volumen maestro)</text:p>
      <text:p text:style-name="Standard"><text:soft-page-break/><text:s text:c="6"/>}</text:p>
      <text:p text:style-name="Standard"/>
      <text:p text:style-name="Standard"><text:s text:c="6"/>if(options.sfxVolume !== undefined){</text:p>
      <text:p text:style-name="Standard"><text:s text:c="10"/>// Similar para efectos - necesitaríamos modificar AudioEngine</text:p>
      <text:p text:style-name="Standard"><text:s text:c="10"/>// Para simplificar, aplicaremos un factor global</text:p>
      <text:p text:style-name="Standard"><text:s text:c="10"/>window.SFX_VOLUME_MULTIPLIER = options.sfxVolume / 100;</text:p>
      <text:p text:style-name="Standard"><text:s text:c="6"/>}</text:p>
      <text:p text:style-name="Standard"/>
      <text:p text:style-name="Standard"><text:s text:c="6"/>// Aplicar modo daltonismo</text:p>
      <text:p text:style-name="Standard"><text:s text:c="6"/>if(options.colorblindMode){</text:p>
      <text:p text:style-name="Standard"><text:s text:c="10"/>document.documentElement.style.setProperty('--colorblind-filter', 'contrast(1.2) brightness(1.1)');</text:p>
      <text:p text:style-name="Standard"><text:s text:c="6"/>} else {</text:p>
      <text:p text:style-name="Standard"><text:s text:c="10"/>document.documentElement.style.removeProperty('--colorblind-filter');</text:p>
      <text:p text:style-name="Standard"><text:s text:c="6"/>}</text:p>
      <text:p text:style-name="Standard"/>
      <text:p text:style-name="Standard"><text:s text:c="6"/>// Otras opciones se aplicarán en el juego mediante verificaciones</text:p>
      <text:p text:style-name="Standard"><text:s text:c="6"/>window.GAME_OPTIONS = options;</text:p>
      <text:p text:style-name="Standard"><text:s text:c="2"/>}</text:p>
      <text:p text:style-name="Standard"/>
      <text:p text:style-name="Standard"><text:s text:c="2"/>// Inicializar opciones al cargar el juego</text:p>
      <text:p text:style-name="Standard"><text:s text:c="2"/>document.addEventListener('DOMContentLoaded', ()=&gt;{</text:p>
      <text:p text:style-name="Standard"><text:s text:c="6"/>const options = loadOptions();</text:p>
      <text:p text:style-name="Standard"><text:s text:c="6"/>applyOptions(options);</text:p>
      <text:p text:style-name="Standard"><text:s text:c="2"/>});</text:p>
      <text:p text:style-name="Standard"/>
      <text:p text:style-name="Standard"><text:s text:c="2"/>Paso 5: Añadir manejadores para los controles de opciones</text:p>
      <text:p text:style-name="Standard"/>
      <text:p text:style-name="Standard"><text:s text:c="2"/>Después del código anterior, agrega los manejadores de eventos:</text:p>
      <text:p text:style-name="Standard"/>
      <text:p text:style-name="Standard"><text:s text:c="2"/>// Manejar cambios en sliders de volumen</text:p>
      <text:p text:style-name="Standard"><text:s text:c="2"/>document.getElementById('music-volume')?.addEventListener('input', (e)=&gt;{</text:p>
      <text:p text:style-name="Standard"><text:s text:c="6"/>const value = e.target.value;</text:p>
      <text:p text:style-name="Standard"><text:s text:c="6"/>document.getElementById('music-volume-value').textContent = value + '%';</text:p>
      <text:p text:style-name="Standard"><text:s text:c="6"/>// Aplicar inmediatamente</text:p>
      <text:p text:style-name="Standard"><text:s text:c="6"/>const audioBg = document.getElementById('audio-bg');</text:p>
      <text:p text:style-name="Standard"><text:s text:c="6"/>if(audioBg) audioBg.volume = value / 100;</text:p>
      <text:p text:style-name="Standard"/>
      <text:p text:style-name="Standard"><text:s text:c="6"/>// Guardar en opciones temporales (se guardará al salir)</text:p>
      <text:p text:style-name="Standard"><text:s text:c="6"/>const currentOptions = loadOptions();</text:p>
      <text:p text:style-name="Standard"><text:s text:c="6"/>currentOptions.musicVolume = parseInt(value);</text:p>
      <text:p text:style-name="Standard"><text:s text:c="6"/>saveOptions(currentOptions);</text:p>
      <text:p text:style-name="Standard"><text:s text:c="2"/>});</text:p>
      <text:p text:style-name="Standard"/>
      <text:p text:style-name="Standard"><text:s text:c="2"/>document.getElementById('sfx-volume')?.addEventListener('input', (e)=&gt;{</text:p>
      <text:p text:style-name="Standard"><text:s text:c="6"/>const value = e.target.value;</text:p>
      <text:p text:style-name="Standard"><text:s text:c="6"/>document.getElementById('sfx-volume-value').textContent = value + '%';</text:p>
      <text:p text:style-name="Standard"><text:s text:c="6"/>window.SFX_VOLUME_MULTIPLIER = value / 100;</text:p>
      <text:p text:style-name="Standard"/>
      <text:p text:style-name="Standard"><text:s text:c="6"/>const currentOptions = loadOptions();</text:p>
      <text:p text:style-name="Standard"><text:s text:c="6"/>currentOptions.sfxVolume = parseInt(value);</text:p>
      <text:p text:style-name="Standard"><text:s text:c="6"/>saveOptions(currentOptions);</text:p>
      <text:p text:style-name="Standard"><text:soft-page-break/><text:s text:c="2"/>});</text:p>
      <text:p text:style-name="Standard"/>
      <text:p text:style-name="Standard"><text:s text:c="2"/>// Manejar checkboxes</text:p>
      <text:p text:style-name="Standard"><text:s text:c="2"/>document.getElementById('colorblind-mode')?.addEventListener('change', (e)=&gt;{</text:p>
      <text:p text:style-name="Standard"><text:s text:c="6"/>const currentOptions = loadOptions();</text:p>
      <text:p text:style-name="Standard"><text:s text:c="6"/>currentOptions.colorblindMode = e.target.checked;</text:p>
      <text:p text:style-name="Standard"><text:s text:c="6"/>saveOptions(currentOptions);</text:p>
      <text:p text:style-name="Standard"><text:s text:c="6"/>applyOptions(currentOptions); // Reaplicar inmediatamente</text:p>
      <text:p text:style-name="Standard"><text:s text:c="2"/>});</text:p>
      <text:p text:style-name="Standard"/>
      <text:p text:style-name="Standard"><text:s text:c="2"/>document.getElementById('reduce-effects')?.addEventListener('change', (e)=&gt;{</text:p>
      <text:p text:style-name="Standard"><text:s text:c="6"/>const currentOptions = loadOptions();</text:p>
      <text:p text:style-name="Standard"><text:s text:c="6"/>currentOptions.reduceEffects = e.target.checked;</text:p>
      <text:p text:style-name="Standard"><text:s text:c="6"/>saveOptions(currentOptions);</text:p>
      <text:p text:style-name="Standard"><text:s text:c="6"/>// Las opciones de reducción se aplicarán en el juego</text:p>
      <text:p text:style-name="Standard"><text:s text:c="2"/>});</text:p>
      <text:p text:style-name="Standard"/>
      <text:p text:style-name="Standard"><text:s text:c="2"/>document.getElementById('hitbox-indicators')?.addEventListener('change', (e)=&gt;{</text:p>
      <text:p text:style-name="Standard"><text:s text:c="6"/>const currentOptions = loadOptions();</text:p>
      <text:p text:style-name="Standard"><text:s text:c="6"/>currentOptions.hitboxIndicators = e.target.checked;</text:p>
      <text:p text:style-name="Standard"><text:s text:c="6"/>saveOptions(currentOptions);</text:p>
      <text:p text:style-name="Standard"><text:s text:c="2"/>});</text:p>
      <text:p text:style-name="Standard"/>
      <text:p text:style-name="Standard"><text:s text:c="2"/>document.getElementById('hold-to-block')?.addEventListener('change', (e)=&gt;{</text:p>
      <text:p text:style-name="Standard"><text:s text:c="6"/>const currentOptions = loadOptions();</text:p>
      <text:p text:style-name="Standard"><text:s text:c="6"/>currentOptions.holdToBlock = e.target.checked;</text:p>
      <text:p text:style-name="Standard"><text:s text:c="6"/>saveOptions(currentOptions);</text:p>
      <text:p text:style-name="Standard"><text:s text:c="2"/>});</text:p>
      <text:p text:style-name="Standard"/>
      <text:p text:style-name="Standard"><text:s text:c="2"/>// Botón de pantalla completa</text:p>
      <text:p text:style-name="Standard"><text:s text:c="2"/>document.getElementById('btn-toggle-fullscreen')?.addEventListener('click', ()=&gt;{</text:p>
      <text:p text:style-name="Standard"><text:s text:c="6"/>if(!document.fullscreenElement){</text:p>
      <text:p text:style-name="Standard"><text:s text:c="10"/>document.documentElement.requestFullscreen().catch(err=&gt;{</text:p>
      <text:p text:style-name="Standard"><text:s text:c="14"/>console.error("Error al intentar pantalla completa:", err);</text:p>
      <text:p text:style-name="Standard"><text:s text:c="14"/>alert("No se pudo activar pantalla completa. Intente presionar F11 manualmente.");</text:p>
      <text:p text:style-name="Standard"><text:s text:c="10"/>});</text:p>
      <text:p text:style-name="Standard"><text:s text:c="6"/>} else {</text:p>
      <text:p text:style-name="Standard"><text:s text:c="10"/>if(document.exitFullscreen){</text:p>
      <text:p text:style-name="Standard"><text:s text:c="14"/>document.exitFullscreen();</text:p>
      <text:p text:style-name="Standard"><text:s text:c="10"/>}</text:p>
      <text:p text:style-name="Standard"><text:s text:c="6"/>}</text:p>
      <text:p text:style-name="Standard"><text:s text:c="2"/>});</text:p>
      <text:p text:style-name="Standard"/>
      <text:p text:style-name="Standard"><text:s text:c="2"/>// Botón de restaurar por defecto</text:p>
      <text:p text:style-name="Standard"><text:s text:c="2"/>document.getElementById('btn-reset-options')?.addEventListener('click', ()=&gt;{</text:p>
      <text:p text:style-name="Standard"><text:s text:c="6"/>if(confirm("¿Está seguro de que quiere restaurar todas las opciones a sus valores predeterminados?")){</text:p>
      <text:p text:style-name="Standard"><text:s text:c="10"/>saveOptions(DEFAULT_OPTIONS);</text:p>
      <text:p text:style-name="Standard"><text:s text:c="10"/>applyOptions(DEFAULT_OPTIONS);</text:p>
      <text:p text:style-name="Standard"><text:s text:c="10"/>// Actualizar UI para reflejar valores por defecto</text:p>
      <text:p text:style-name="Standard"><text:s text:c="10"/>document.getElementById('music-volume').value = DEFAULT_OPTIONS.musicVolume;</text:p>
      <text:p text:style-name="Standard"><text:soft-page-break/><text:s text:c="10"/>document.getElementById('music-volume-value').textContent = DEFAULT_OPTIONS.musicVolume + '%';</text:p>
      <text:p text:style-name="Standard"><text:s text:c="10"/>document.getElementById('sfx-volume').value = DEFAULT_OPTIONS.sfxVolume;</text:p>
      <text:p text:style-name="Standard"><text:s text:c="10"/>document.getElementById('sfx-volume-value').textContent = DEFAULT_OPTIONS.sfxVolume + '%';</text:p>
      <text:p text:style-name="Standard"><text:s text:c="10"/>// Desmarcar todos los checkboxes</text:p>
      <text:p text:style-name="Standard"><text:s text:c="10"/>document.querySelectorAll('#screen-options input[type="checkbox"]').forEach(cb=&gt; cb.checked = false);</text:p>
      <text:p text:style-name="Standard"><text:s text:c="6"/>}</text:p>
      <text:p text:style-name="Standard"><text:s text:c="2"/>});</text:p>
      <text:p text:style-name="Standard"/>
      <text:p text:style-name="Standard"><text:s text:c="2"/>// Botón de volver</text:p>
      <text:p text:style-name="Standard"><text:s text:c="2"/>document.getElementById('btn-back-options')?.addEventListener('click', ()=&gt;{</text:p>
      <text:p text:style-name="Standard"><text:s text:c="6"/>showScreen('screen-title');</text:p>
      <text:p text:style-name="Standard"><text:s text:c="2"/>});</text:p>
      <text:p text:style-name="Standard"/>
      <text:p text:style-name="Standard"><text:s text:c="2"/>Paso 6: Integrar opciones en el juego</text:p>
      <text:p text:style-name="Standard"/>
      <text:p text:style-name="Standard"><text:s text:c="2"/>Ahora necesitamos hacer que el juego respete estas opciones. Busca donde sea apropiado y agrega verificaciones:</text:p>
      <text:p text:style-name="Standard"/>
      <text:p text:style-name="Standard"><text:s text:c="2"/>En el AudioEngine para volumen de efectos:</text:p>
      <text:p text:style-name="Standard"><text:s text:c="2"/>Busca donde se crea el master gain (en el AudioEngine, alrededor de línea 1286) y modifícalo:</text:p>
      <text:p text:style-name="Standard"/>
      <text:p text:style-name="Standard"><text:s text:c="2"/>master = ctx.createGain();</text:p>
      <text:p text:style-name="Standard"><text:s text:c="2"/>master.gain.value = 0.22 * (window.SFX_VOLUME_MULTIPLIER || 1); // Aplicar multiplicador de SFX</text:p>
      <text:p text:style-name="Standard"/>
      <text:p text:style-name="Standard"><text:s text:c="2"/>En los efectos de pantalla para reducir intensidad:</text:p>
      <text:p text:style-name="Standard"><text:s text:c="2"/>Busca donde se llama a triggerScreenEffect() y agrega:</text:p>
      <text:p text:style-name="Standard"/>
      <text:p text:style-name="Standard"><text:s text:c="2"/>function triggerScreenEffect(kind){</text:p>
      <text:p text:style-name="Standard"><text:s text:c="6"/>// Respetar opción de reducir efectos</text:p>
      <text:p text:style-name="Standard"><text:s text:c="6"/>if(window.GAME_OPTIONS?.reduceEffects){</text:p>
      <text:p text:style-name="Standard"><text:s text:c="10"/>if(kind==='heavy'){</text:p>
      <text:p text:style-name="Standard"><text:s text:c="14"/>// Reducir intensidad pero mantener efecto visible</text:p>
      <text:p text:style-name="Standard"><text:s text:c="14"/>S.shake = Math.max(S.shake||0, 7); // Era 14</text:p>
      <text:p text:style-name="Standard"><text:s text:c="14"/>S.flash = Math.max(S.flash||0, 0.18); // Era 0.35</text:p>
      <text:p text:style-name="Standard"><text:s text:c="10"/>} else {</text:p>
      <text:p text:style-name="Standard"><text:s text:c="14"/>S.shake = Math.max(S.shake||0, 3); // Era 6</text:p>
      <text:p text:style-name="Standard"><text:s text:c="14"/>S.flash = Math.max(S.flash||0, 0.08); // Era 0.15</text:p>
      <text:p text:style-name="Standard"><text:s text:c="10"/>}</text:p>
      <text:p text:style-name="Standard"><text:s text:c="6"/>} else {</text:p>
      <text:p text:style-name="Standard"><text:s text:c="10"/>// Comportamiento original</text:p>
      <text:p text:style-name="Standard"><text:s text:c="10"/>if(kind==='heavy'){</text:p>
      <text:p text:style-name="Standard"><text:s text:c="14"/>S.shake = Math.max(S.shake||0, 14);</text:p>
      <text:p text:style-name="Standard"><text:s text:c="14"/>S.flash = Math.max(S.flash||0, 0.35);</text:p>
      <text:p text:style-name="Standard"><text:s text:c="10"/>} else {</text:p>
      <text:p text:style-name="Standard"><text:s text:c="14"/>S.shake = Math.max(S.shake||0, 6);</text:p>
      <text:p text:style-name="Standard"><text:s text:c="14"/>S.flash = Math.max(S.flash||0, 0.15);</text:p>
      <text:p text:style-name="Standard"><text:s text:c="10"/>}</text:p>
      <text:p text:style-name="Standard"><text:s text:c="6"/>}</text:p>
      <text:p text:style-name="Standard"><text:soft-page-break/><text:s text:c="6"/>// ... resto de la función sin cambios ...</text:p>
      <text:p text:style-name="Standard"><text:s text:c="2"/>}</text:p>
      <text:p text:style-name="Standard"/>
      <text:p text:style-name="Standard"><text:s text:c="2"/>En los indicadores de golpe/parry:</text:p>
      <text:p text:style-name="Standard"><text:s text:c="2"/>En la función applyDamage() donde se añaden partículas de texto, agrega:</text:p>
      <text:p text:style-name="Standard"/>
      <text:p text:style-name="Standard"><text:s text:c="2"/>// Después de: addParticle({x:def.x+def.w/2, y:GROUND_Y-def.h*0.6, type:'hit', color:opts.color||'#fff', text:opts.text});</text:p>
      <text:p text:style-name="Standard"/>
      <text:p text:style-name="Standard"><text:s text:c="2"/>// INDICADORES VISUALES DE GOLO/PARRY (si está activado)</text:p>
      <text:p text:style-name="Standard"><text:s text:c="2"/>if(window.GAME_OPTIONS?.hitboxIndicators &amp;&amp; opts.text){</text:p>
      <text:p text:style-name="Standard"><text:s text:c="6"/>// Añadir un efecto visual adicional para golpes significativos</text:p>
      <text:p text:style-name="Standard"><text:s text:c="6"/>if(opts.hitKind==='special' || opts.hitKind==='heavy' || opts.hitKind==='jumpheavy'){</text:p>
      <text:p text:style-name="Standard"><text:s text:c="10"/>S.particles.push({</text:p>
      <text:p text:style-name="Standard"><text:s text:c="14"/>type:'hit',</text:p>
      <text:p text:style-name="Standard"><text:s text:c="14"/>x:def.x+def.w/2,</text:p>
      <text:p text:style-name="Standard"><text:s text:c="14"/>y:GROUND_Y-def.h*0.4,</text:p>
      <text:p text:style-name="Standard"><text:s text:c="14"/>color:'#00ffff',</text:p>
      <text:p text:style-name="Standard"><text:s text:c="14"/>text:'¡'+opts.text.toUpperCase()+'!',</text:p>
      <text:p text:style-name="Standard"><text:s text:c="14"/>life:20</text:p>
      <text:p text:style-name="Standard"><text:s text:c="10"/>});</text:p>
      <text:p text:style-name="Standard"><text:s text:c="6"/>}</text:p>
      <text:p text:style-name="Standard"><text:s text:c="6"/>// Indicador especial para parry exitoso</text:p>
      <text:p text:style-name="Standard"><text:s text:c="6"/>if(opts.text==='¡PARRY!' &amp;&amp; def.state==='block'){</text:p>
      <text:p text:style-name="Standard"><text:s text:c="10"/>S.particles.push({</text:p>
      <text:p text:style-name="Standard"><text:s text:c="14"/>type:'hit',</text:p>
      <text:p text:style-name="Standard"><text:s text:c="14"/>x:def.x+def.w/2,</text:p>
      <text:p text:style-name="Standard"><text:s text:c="14"/>y:GROUND_Y-def.h*0.5,</text:p>
      <text:p text:style-name="Standard"><text:s text:c="14"/>color:'#ffd23f',</text:p>
      <text:p text:style-name="Standard"><text:s text:c="14"/>text:'¡PARRY PERFECTO!',</text:p>
      <text:p text:style-name="Standard"><text:s text:c="14"/>life:25</text:p>
      <text:p text:style-name="Standard"><text:s text:c="10"/>});</text:p>
      <text:p text:style-name="Standard"><text:s text:c="6"/>}</text:p>
      <text:p text:style-name="Standard"><text:s text:c="2"/>}</text:p>
      <text:p text:style-name="Standard"/>
      <text:p text:style-name="Standard"><text:s text:c="2"/>Para el modo de bloquear mantener presionado:</text:p>
      <text:p text:style-name="Standard"><text:s text:c="2"/>Busca donde se maneja el input de bloqueo (en updateFighter() alrededor de línea 2014) y modifícalo:</text:p>
      <text:p text:style-name="Standard"/>
      <text:p text:style-name="Standard"><text:s text:c="2"/>// Reemplazar esta sección:</text:p>
      <text:p text:style-name="Standard"><text:s text:c="2"/>if(controls.block &amp;&amp; f.y&gt;=0){</text:p>
      <text:p text:style-name="Standard"><text:s text:c="6"/>f.blockFrames = (f.blockFrames||0) + 1;</text:p>
      <text:p text:style-name="Standard"><text:s text:c="6"/>setState(f,'block',1);</text:p>
      <text:p text:style-name="Standard"><text:s text:c="2"/>} else {</text:p>
      <text:p text:style-name="Standard"><text:s text:c="6"/>// ... resto ...</text:p>
      <text:p text:style-name="Standard"><text:s text:c="2"/>}</text:p>
      <text:p text:style-name="Standard"/>
      <text:p text:style-name="Standard"><text:s text:c="2"/>// Por esta sección que respeta la opción:</text:p>
      <text:p text:style-name="Standard"><text:s text:c="2"/>if(window.GAME_OPTIONS?.holdToBlock){</text:p>
      <text:p text:style-name="Standard"><text:s text:c="6"/>// Modo mantener presionado</text:p>
      <text:p text:style-name="Standard"><text:s text:c="6"/>if(controls.block &amp;&amp; f.y&gt;=0){</text:p>
      <text:p text:style-name="Standard"><text:s text:c="10"/>f.blockFrames = (f.blockFrames||0) + 1;</text:p>
      <text:p text:style-name="Standard"><text:soft-page-break/><text:s text:c="10"/>setState(f,'block',1);</text:p>
      <text:p text:style-name="Standard"><text:s text:c="6"/>} else if(f.state === 'block' &amp;&amp; !controls.block){</text:p>
      <text:p text:style-name="Standard"><text:s text:c="10"/>f.state = 'idle'; // Soltar bloqueo al dejar de presionar</text:p>
      <text:p text:style-name="Standard"><text:s text:c="6"/>}</text:p>
      <text:p text:style-name="Standard"><text:s text:c="2"/>} else {</text:p>
      <text:p text:style-name="Standard"><text:s text:c="6"/>// Modo toggle original (presionar para activar, presionar nuevamente para desactivar)</text:p>
      <text:p text:style-name="Standard"><text:s text:c="6"/>if(controls.block &amp;&amp; f.y&gt;=0){</text:p>
      <text:p text:style-name="Standard"><text:s text:c="10"/>if(f.state !== 'block'){</text:p>
      <text:p text:style-name="Standard"><text:s text:c="14"/>f.blockFrames = 1;</text:p>
      <text:p text:style-name="Standard"><text:s text:c="14"/>setState(f,'block',1);</text:p>
      <text:p text:style-name="Standard"><text:s text:c="10"/>} else {</text:p>
      <text:p text:style-name="Standard"><text:s text:c="14"/>f.state = 'idle';</text:p>
      <text:p text:style-name="Standard"><text:s text:c="14"/>f.blockFrames = 0;</text:p>
      <text:p text:style-name="Standard"><text:s text:c="10"/>}</text:p>
      <text:p text:style-name="Standard"><text:s text:c="6"/>}</text:p>
      <text:p text:style-name="Standard"><text:s text:c="2"/>}</text:p>
      <text:p text:style-name="Standard"/>
      <text:p text:style-name="Standard"><text:s text:c="2"/>✅ Beneficios de las opciones de accesibilidad y pulido:</text:p>
      <text:p text:style-name="Standard"/>
      <text:p text:style-name="Standard"><text:s text:c="2"/>- Personalización total: Los jugadores pueden adaptar el juego a sus necesidades</text:p>
      <text:p text:style-name="Standard"><text:s text:c="2"/>- Inclusividad: Opciones para daltónicos, personas sensibles a estímulos visuales, etc.</text:p>
      <text:p text:style-name="Standard"><text:s text:c="2"/>- Mejor control: Opciones de bloqueo y sensibilidad para diferentes estilos de juego</text:p>
      <text:p text:style-name="Standard"><text:s text:c="2"/>- Experiencia de torneo: Opciones para reducir distracciones en partidas competitivas</text:p>
      <text:p text:style-name="Standard"><text:s text:c="2"/>- Persistencia: Las opciones se guardan entre sesiones</text:p>
      <text:p text:style-name="Standard"><text:s text:c="2"/>- Mejora de la calidad general: Pequeños detalles que hacen que el juego se sienta más profesional</text:p>
      <text:p text:style-name="Standard"/>
      <text:p text:style-name="Standard"><text:s text:c="2"/>📝 Notas de implementación:</text:p>
      <text:p text:style-name="Standard"/>
      <text:p text:style-name="Standard"><text:s text:c="2"/>1. Estas opciones son mayormente aditivas y no rompen el gameplay existente</text:p>
      <text:p text:style-name="Standard"><text:s text:c="2"/>2. Puedes empezar implementando solo el menú y el guardado, luego ir añadiendo las integraciones</text:p>
      <text:p text:style-name="Standard"><text:s text:c="2"/>3. Algunas opciones (como modificar el AudioEngine para volumen de efectos) requieren cambios más profundos</text:p>
      <text:p text:style-name="Standard"><text:s text:c="2"/>4. Considera usar CSS variables para temas de color (modo daltonismo, temas oscuros/claros)</text:p>
      <text:p text:style-name="Standard"><text:s text:c="2"/>5. El modo pantalla completa puede tener problemas en algunos navegadores - siempre proporcionar una alternativa</text:p>
      <text:p text:style-name="Standard"/>
      <text:p text:style-name="Standard"><text:s text:c="2"/>---</text:p>
      <text:p text:style-name="Standard"><text:s text:c="2"/>6. 💾 ALMACENAMIENTO LOCAL PARA LOGROS Y RÉCORDS (PERSISTENCIA)</text:p>
      <text:p text:style-name="Standard"/>
      <text:p text:style-name="Standard"><text:s text:c="2"/>Problema: El juego no recuerda el progreso, logros o récords entre sesiones.</text:p>
      <text:p text:style-name="Standard"/>
      <text:p text:style-name="Standard"><text:s text:c="2"/>Solución: Implementar un sistema de almacenamiento local que registre:</text:p>
      <text:p text:style-name="Standard"><text:s text:c="2"/>- Victorias por personaje</text:p>
      <text:p text:style-name="Standard"><text:s text:c="2"/>- Mejor combo alcanzado</text:p>
      <text:p text:style-name="Standard"><text:s text:c="2"/>- Tiempo de juego total</text:p>
      <text:p text:style-name="Standard"><text:s text:c="2"/>- Desbloqueables logrados</text:p>
      <text:p text:style-name="Standard"><text:s text:c="2"/>- Récords de modo historia (1P)</text:p>
      <text:p text:style-name="Standard"><text:s text:c="2"/>- Logros especiales (ej: "Ganar sin recibir daño")</text:p>
      <text:p text:style-name="Standard"/>
      <text:p text:style-name="Standard"><text:s text:c="2"/>Pasos a seguir:</text:p>
      <text:p text:style-name="Standard"/>
      <text:p text:style-name="Standard"><text:soft-page-break/><text:s text:c="2"/>Paso 1: Definir la estructura de datos de persistencia</text:p>
      <text:p text:style-name="Standard"/>
      <text:p text:style-name="Standard"><text:s text:c="2"/>Después de donde se define const S = { (alrededor de línea 1163), agrega un objeto para almacenamiento persistente:</text:p>
      <text:p text:style-name="Standard"/>
      <text:p text:style-name="Standard"><text:s text:c="2"/>const PERSISTENT_DATA = {</text:p>
      <text:p text:style-name="Standard"><text:s text:c="6"/>// Cargar al inicio, guardar al salir o en momentos clave</text:p>
      <text:p text:style-name="Standard"><text:s text:c="6"/>load(){</text:p>
      <text:p text:style-name="Standard"><text:s text:c="10"/>const saved = localStorage.getItem('codegraFightersSave');</text:p>
      <text:p text:style-name="Standard"><text:s text:c="10"/>if(saved){</text:p>
      <text:p text:style-name="Standard"><text:s text:c="14"/>try{</text:p>
      <text:p text:style-name="Standard"><text:s text:c="18"/>return JSON.parse(saved);</text:p>
      <text:p text:style-name="Standard"><text:s text:c="14"/>}catch(e){</text:p>
      <text:p text:style-name="Standard"><text:s text:c="18"/>console.error("Error al cargar partida guardada:", e);</text:p>
      <text:p text:style-name="Standard"><text:s text:c="18"/>return this.getDefaults();</text:p>
      <text:p text:style-name="Standard"><text:s text:c="14"/>}</text:p>
      <text:p text:style-name="Standard"><text:s text:c="10"/>}</text:p>
      <text:p text:style-name="Standard"><text:s text:c="10"/>return this.getDefaults();</text:p>
      <text:p text:style-name="Standard"><text:s text:c="6"/>},</text:p>
      <text:p text:style-name="Standard"/>
      <text:p text:style-name="Standard"><text:s text:c="6"/>getDefaults(){</text:p>
      <text:p text:style-name="Standard"><text:s text:c="10"/>return {</text:p>
      <text:p text:style-name="Standard"><text:s text:c="14"/>version: "1.0", // Para futuras actualizaciones</text:p>
      <text:p text:style-name="Standard"><text:s text:c="14"/>lastPlayed: Date.now(),</text:p>
      <text:p text:style-name="Standard"><text:s text:c="14"/>totalPlayTime: 0, // En milisegundos</text:p>
      <text:p text:style-name="Standard"><text:s text:c="14"/>characterStats: {}, // Por id de personaje: {wins, losses, bestCombo, etc}</text:p>
      <text:p text:style-name="Standard"><text:s text:c="14"/>enemyProgress: { // Para modo 1P</text:p>
      <text:p text:style-name="Standard"><text:s text:c="18"/>currentEnemyIndex: 0,</text:p>
      <text:p text:style-name="Standard"><text:s text:c="18"/>unlockedSecretChars: false,</text:p>
      <text:p text:style-name="Standard"><text:s text:c="18"/>stageVictories: {}, // Por id de escenario: veces ganado</text:p>
      <text:p text:style-name="Standard"><text:s text:c="18"/>perfectVictories: 0 // Victorias sin recibir daño</text:p>
      <text:p text:style-name="Standard"><text:s text:c="14"/>},</text:p>
      <text:p text:style-name="Standard"><text:s text:c="14"/>achievements: {</text:p>
      <text:p text:style-name="Standard"><text:s text:c="18"/>// Formato: {id: {unlocked: boolean, date: timestamp}}</text:p>
      <text:p text:style-name="Standard"><text:s text:c="18"/>"first_win": {unlocked:false},</text:p>
      <text:p text:style-name="Standard"><text:s text:c="18"/>"combo_master": {unlocked:false, requirement:50}, // 50 combo</text:p>
      <text:p text:style-name="Standard"><text:s text:c="18"/>"no_damage": {unlocked:false, requirement:1}, // Ganar 1 partida sin daño</text:p>
      <text:p text:style-name="Standard"><text:s text:c="18"/>"all_characters": {unlocked:false}, // Ganar con todos los personajes</text:p>
      <text:p text:style-name="Standard"><text:s text:c="18"/>"perfect_round": {unlocked:false}, // Ganar un round sin recibir daño ni perder meter</text:p>
      <text:p text:style-name="Standard"><text:s text:c="18"/>"special_spammer": {unlocked:false, requirement:100}, // 100 specials usados</text:p>
      <text:p text:style-name="Standard"><text:s text:c="18"/>"tournament_winner": {unlocked:false} // Ganar modo 2P 10 veces</text:p>
      <text:p text:style-name="Standard"><text:s text:c="14"/>},</text:p>
      <text:p text:style-name="Standard"><text:s text:c="14"/>settings: DEFAULT_OPTIONS // Reutilizar las opciones definidas antes</text:p>
      <text:p text:style-name="Standard"><text:s text:c="10"/>};</text:p>
      <text:p text:style-name="Standard"><text:s text:c="6"/>},</text:p>
      <text:p text:style-name="Standard"/>
      <text:p text:style-name="Standard"><text:s text:c="6"/>save(data){</text:p>
      <text:p text:style-name="Standard"><text:s text:c="10"/>try{</text:p>
      <text:p text:style-name="Standard"><text:s text:c="14"/>// Actualizar tiempo de juego</text:p>
      <text:p text:style-name="Standard"><text:s text:c="14"/>data.lastPlayed = Date.now();</text:p>
      <text:p text:style-name="Standard"><text:s text:c="14"/>if(data.sessionStart){</text:p>
      <text:p text:style-name="Standard"><text:s text:c="18"/>data.totalPlayTime += Date.now() - data.sessionStart;</text:p>
      <text:p text:style-name="Standard"><text:soft-page-break/><text:s text:c="14"/>}</text:p>
      <text:p text:style-name="Standard"><text:s text:c="14"/>localStorage.setItem('codegraFightersSave', JSON.stringify(data));</text:p>
      <text:p text:style-name="Standard"><text:s text:c="10"/>}catch(e){</text:p>
      <text:p text:style-name="Standard"><text:s text:c="14"/>console.error("Error al guardar partida:", e);</text:p>
      <text:p text:style-name="Standard"><text:s text:c="10"/>}</text:p>
      <text:p text:style-name="Standard"><text:s text:c="6"/>},</text:p>
      <text:p text:style-name="Standard"/>
      <text:p text:style-name="Standard"><text:s text:c="6"/>// Funciones helper para actualizar estadísticas</text:p>
      <text:p text:style-name="Standard"><text:s text:c="6"/>incrementWins(characterId){</text:p>
      <text:p text:style-name="Standard"><text:s text:c="10"/>const data = this.load();</text:p>
      <text:p text:style-name="Standard"><text:s text:c="10"/>if(!data.characterStats[characterId]){</text:p>
      <text:p text:style-name="Standard"><text:s text:c="14"/>data.characterStats[characterId] = {wins:0, losses:0, bestCombo:0, totalSpecialsUsed:0};</text:p>
      <text:p text:style-name="Standard"><text:s text:c="10"/>}</text:p>
      <text:p text:style-name="Standard"><text:s text:c="10"/>data.characterStats[characterId].wins++;</text:p>
      <text:p text:style-name="Standard"><text:s text:c="10"/>this.save(data);</text:p>
      <text:p text:style-name="Standard"><text:s text:c="6"/>},</text:p>
      <text:p text:style-name="Standard"/>
      <text:p text:style-name="Standard"><text:s text:c="6"/>incrementLosses(characterId){</text:p>
      <text:p text:style-name="Standard"><text:s text:c="10"/>const data = this.load();</text:p>
      <text:p text:style-name="Standard"><text:s text:c="10"/>if(!data.characterStats[characterId]){</text:p>
      <text:p text:style-name="Standard"><text:s text:c="14"/>data.characterStats[characterId] = {wins:0, losses:0, bestCombo:0, totalSpecialsUsed:0};</text:p>
      <text:p text:style-name="Standard"><text:s text:c="10"/>}</text:p>
      <text:p text:style-name="Standard"><text:s text:c="10"/>data.characterStats[characterId].losses++;</text:p>
      <text:p text:style-name="Standard"><text:s text:c="10"/>this.save(data);</text:p>
      <text:p text:style-name="Standard"><text:s text:c="6"/>},</text:p>
      <text:p text:style-name="Standard"/>
      <text:p text:style-name="Standard"><text:s text:c="6"/>updateBestCombo(characterId, combo){</text:p>
      <text:p text:style-name="Standard"><text:s text:c="10"/>const data = this.load();</text:p>
      <text:p text:style-name="Standard"><text:s text:c="10"/>if(!data.characterStats[characterId]){</text:p>
      <text:p text:style-name="Standard"><text:s text:c="14"/>data.characterStats[characterId] = {wins:0, losses:0, bestCombo:0, totalSpecialsUsed:0};</text:p>
      <text:p text:style-name="Standard"><text:s text:c="10"/>}</text:p>
      <text:p text:style-name="Standard"><text:s text:c="10"/>if(combo &gt; data.characterStats[characterId].bestCombo){</text:p>
      <text:p text:style-name="Standard"><text:s text:c="14"/>data.characterStats[characterId].bestCombo = combo;</text:p>
      <text:p text:style-name="Standard"><text:s text:c="14"/>this.save(data);</text:p>
      <text:p text:style-name="Standard"><text:s text:c="14"/>// Verificar si se desbloqueó algún logro</text:p>
      <text:p text:style-name="Standard"><text:s text:c="14"/>this.checkAchievement('combo_master', data.characterStats[characterId].bestCombo);</text:p>
      <text:p text:style-name="Standard"><text:s text:c="10"/>}</text:p>
      <text:p text:style-name="Standard"><text:s text:c="6"/>},</text:p>
      <text:p text:style-name="Standard"/>
      <text:p text:style-name="Standard"><text:s text:c="6"/>// ... más helpers según necesites ...</text:p>
      <text:p text:style-name="Standard"><text:s text:c="2"/>};</text:p>
      <text:p text:style-name="Standard"/>
      <text:p text:style-name="Standard"><text:s text:c="2"/>Paso 2: Inicializar el almacenamiento al cargar el juego</text:p>
      <text:p text:style-name="Standard"/>
      <text:p text:style-name="Standard"><text:s text:c="2"/>Después de donde se define CONFIG y antes de donde se inicializa el AudioEngine, agrega:</text:p>
      <text:p text:style-name="Standard"/>
      <text:p text:style-name="Standard"><text:s text:c="2"/>// Inicializar datos persistentes</text:p>
      <text:p text:style-name="Standard"><text:s text:c="2"/>const persistentData = PERSISTENT_DATA.load();</text:p>
      <text:p text:style-name="Standard"><text:s text:c="2"/>// Iniciar seguimiento de tiempo de sesión</text:p>
      <text:p text:style-name="Standard"><text:s text:c="2"/>persistentData.sessionStart = Date.now();</text:p>
      <text:p text:style-name="Standard"><text:s text:c="2"/>// Aplicar opciones guardadas</text:p>
      <text:p text:style-name="Standard"><text:s text:c="2"/>if(persistentData.settings){</text:p>
      <text:p text:style-name="Standard"><text:soft-page-break/><text:s text:c="6"/>applyOptions(persistentData.settings);</text:p>
      <text:p text:style-name="Standard"><text:s text:c="2"/>}</text:p>
      <text:p text:style-name="Standard"/>
      <text:p text:style-name="Standard"><text:s text:c="2"/>Paso 3: Guardar datos al salir o en momentos apropiados</text:p>
      <text:p text:style-name="Standard"/>
      <text:p text:style-name="Standard"><text:s text:c="2"/>Añade un manejador para cuando se cierre la página o se navegue lejos:</text:p>
      <text:p text:style-name="Standard"/>
      <text:p text:style-name="Standard"><text:s text:c="2"/>// Guardar al salir de la página</text:p>
      <text:p text:style-name="Standard"><text:s text:c="2"/>window.addEventListener('beforeunload', ()=&gt;{</text:p>
      <text:p text:style-name="Standard"><text:s text:c="6"/>persistentData.save(PERSISTENT_DATA.load()); // Guardar estado actual</text:p>
      <text:p text:style-name="Standard"><text:s text:c="2"/>});</text:p>
      <text:p text:style-name="Standard"/>
      <text:p text:style-name="Standard"><text:s text:c="2"/>// También guardar ocasionalmente durante el juego (cada 5 minutos)</text:p>
      <text:p text:style-name="Standard"><text:s text:c="2"/>setInterval(()=&gt;{</text:p>
      <text:p text:style-name="Standard"><text:s text:c="6"/>persistentData.save(PERSISTENT_DATA.load());</text:p>
      <text:p text:style-name="Standard"><text:s text:c="2"/>}, 300000); // 5 minutos</text:p>
      <text:p text:style-name="Standard"/>
      <text:p text:style-name="Standard"><text:s text:c="2"/>Paso 4: Integrar tracking de estadísticas en el juego</text:p>
      <text:p text:style-name="Standard"/>
      <text:p text:style-name="Standard"><text:s text:c="2"/>Al final de cada ronda:</text:p>
      <text:p text:style-name="Standard"><text:s text:c="2"/>Busca donde se llama a endRound() (alrededor de línea 2860) y modifica el final de esa función:</text:p>
      <text:p text:style-name="Standard"/>
      <text:p text:style-name="Standard"><text:s text:c="2"/>function endRound(f1,f2){</text:p>
      <text:p text:style-name="Standard"><text:s text:c="6"/>// ... código existente de endRound ...</text:p>
      <text:p text:style-name="Standard"/>
      <text:p text:style-name="Standard"><text:s text:c="6"/>// TRACKING DE ESTADÍSTICAS</text:p>
      <text:p text:style-name="Standard"><text:s text:c="6"/>const winner = S.lastWinner; // 'p1', 'p2', o 'draw'</text:p>
      <text:p text:style-name="Standard"><text:s text:c="6"/>const is1pMode = S.mode === '1p';</text:p>
      <text:p text:style-name="Standard"/>
      <text:p text:style-name="Standard"><text:s text:c="6"/>if(winner !== 'draw'){</text:p>
      <text:p text:style-name="Standard"><text:s text:c="10"/>const winnerCharId = winner === 'p1' ? S.p1Def.id : S.p2Def.id;</text:p>
      <text:p text:style-name="Standard"><text:s text:c="10"/>const loserCharId = winner === 'p1' ? S.p2Def.id : S.p1Def.id;</text:p>
      <text:p text:style-name="Standard"/>
      <text:p text:style-name="Standard"><text:s text:c="10"/>// Actualizar victorias/derrotas</text:p>
      <text:p text:style-name="Standard"><text:s text:c="10"/>PERSISTENT_DATA.incrementWins(winnerCharId);</text:p>
      <text:p text:style-name="Standard"><text:s text:c="10"/>PERSISTENT_DATA.incrementLosses(loserCharId);</text:p>
      <text:p text:style-name="Standard"/>
      <text:p text:style-name="Standard"><text:s text:c="10"/>// Actualizar mejor combo</text:p>
      <text:p text:style-name="Standard"><text:s text:c="10"/>const winnerFighter = winner === 'p1' ? S.fighters[0] : S.fighters[1];</text:p>
      <text:p text:style-name="Standard"><text:s text:c="10"/>PERSISTENT_DATA.updateBestCombo(winnerCharId, winnerFighter.combo||0);</text:p>
      <text:p text:style-name="Standard"/>
      <text:p text:style-name="Standard"><text:s text:c="10"/>// Tracking especial para modo 1P</text:p>
      <text:p text:style-name="Standard"><text:s text:c="10"/>if(is1pMode){</text:p>
      <text:p text:style-name="Standard"><text:s text:c="14"/>const data = PERSISTENT_DATA.load();</text:p>
      <text:p text:style-name="Standard"><text:s text:c="14"/>// Incrementar victories en este escenario</text:p>
      <text:p text:style-name="Standard"><text:s text:c="14"/>const stageId = S.stageId;</text:p>
      <text:p text:style-name="Standard"><text:s text:c="14"/>data.enemyProgress.stageVictories[stageId] = (data.enemyProgress.stageVictories[stageId]||0) + 1;</text:p>
      <text:p text:style-name="Standard"/>
      <text:p text:style-name="Standard"><text:s text:c="14"/>// Verificar si fue victoria perfecta (no recibió daño)</text:p>
      <text:p text:style-name="Standard"><text:s text:c="14"/>const winnerFighterHpRatio = winnerFighter.hp / winnerFighter.maxHp;</text:p>
      <text:p text:style-name="Standard"><text:s text:c="14"/>if(winnerFighterHpRatio === 1){</text:p>
      <text:p text:style-name="Standard"><text:soft-page-break/><text:s text:c="18"/>data.enemyProgress.perfectVictories++;</text:p>
      <text:p text:style-name="Standard"><text:s text:c="18"/>// Verificar logro de "no damage"</text:p>
      <text:p text:style-name="Standard"><text:s text:c="18"/>PERSISTENT_DATA.checkAchievement('no_damage', 1); // Simple contador</text:p>
      <text:p text:style-name="Standard"><text:s text:c="14"/>}</text:p>
      <text:p text:style-name="Standard"/>
      <text:p text:style-name="Standard"><text:s text:c="14"/>// Avanzar al siguiente enemigo si ganó</text:p>
      <text:p text:style-name="Standard"><text:s text:c="14"/>if(winner === 'p1'){</text:p>
      <text:p text:style-name="Standard"><text:s text:c="18"/>data.enemyProgress.currentEnemyIndex++;</text:p>
      <text:p text:style-name="Standard"><text:s text:c="18"/>// Verificar si se desbloquearon personajes secretos</text:p>
      <text:p text:style-name="Standard"><text:s text:c="18"/>if(data.enemyProgress.currentEnemyIndex &gt;= ENEMIES.length &amp;&amp; !data.enemyProgress.unlockedSecretChars){</text:p>
      <text:p text:style-name="Standard"><text:s text:c="22"/>data.enemyProgress.unlockedSecretChars = true;</text:p>
      <text:p text:style-name="Standard"><text:s text:c="22"/>// Aquí podríamos mostrar un mensaje de desbloqueo</text:p>
      <text:p text:style-name="Standard"><text:s text:c="18"/>}</text:p>
      <text:p text:style-name="Standard"><text:s text:c="14"/>}</text:p>
      <text:p text:style-name="Standard"/>
      <text:p text:style-name="Standard"><text:s text:c="14"/>PERSISTENT_DATA.save(data);</text:p>
      <text:p text:style-name="Standard"><text:s text:c="10"/>}</text:p>
      <text:p text:style-name="Standard"/>
      <text:p text:style-name="Standard"><text:s text:c="10"/>// Tracking para logros de modo 2P</text:p>
      <text:p text:style-name="Standard"><text:s text:c="10"/>if(S.mode === '2p'){</text:p>
      <text:p text:style-name="Standard"><text:s text:c="14"/>const data = PERSISTENT_DATA.load();</text:p>
      <text:p text:style-name="Standard"><text:s text:c="14"/>data.achievements.tournament_winner =</text:p>
      <text:p text:style-name="Standard"><text:s text:c="18"/>(data.achievements.tournament_winner?.count||0) + 1 &gt;= 10;</text:p>
      <text:p text:style-name="Standard"><text:s text:c="14"/>PERSISTENT_DATA.save(data);</text:p>
      <text:p text:style-name="Standard"><text:s text:c="10"/>}</text:p>
      <text:p text:style-name="Standard"><text:s text:c="6"/>}</text:p>
      <text:p text:style-name="Standard"/>
      <text:p text:style-name="Standard"><text:s text:c="6"/>// ... resto de endRound existente (victory pose, etc.) ...</text:p>
      <text:p text:style-name="Standard"><text:s text:c="2"/>}</text:p>
      <text:p text:style-name="Standard"/>
      <text:p text:style-name="Standard"><text:s text:c="2"/>Paso 5: Añadir función de verificación de logros</text:p>
      <text:p text:style-name="Standard"/>
      <text:p text:style-name="Standard"><text:s text:c="2"/>Después de los helpers de PERSISTENT_DATA, agrega:</text:p>
      <text:p text:style-name="Standard"/>
      <text:p text:style-name="Standard"><text:s text:c="2"/>// En el objeto PERSISTENT_DATA, agrega este método:</text:p>
      <text:p text:style-name="Standard"><text:s text:c="2"/>checkAchievement(achievementId, progress){</text:p>
      <text:p text:style-name="Standard"><text:s text:c="6"/>const data = this.load();</text:p>
      <text:p text:style-name="Standard"><text:s text:c="6"/>const achievement = data.achievements[achievementId];</text:p>
      <text:p text:style-name="Standard"><text:s text:c="6"/>if(!achievement) return false;</text:p>
      <text:p text:style-name="Standard"/>
      <text:p text:style-name="Standard"><text:s text:c="6"/>if(achievement.unlocked) return true; // Ya desbloqueado</text:p>
      <text:p text:style-name="Standard"/>
      <text:p text:style-name="Standard"><text:s text:c="6"/>let unlocked = false;</text:p>
      <text:p text:style-name="Standard"><text:s text:c="6"/>switch(achievementId){</text:p>
      <text:p text:style-name="Standard"><text:s text:c="10"/>case 'first_win':</text:p>
      <text:p text:style-name="Standard"><text:s text:c="14"/>// Desbloquear después de la primera victoria en cualquier modo</text:p>
      <text:p text:style-name="Standard"><text:s text:c="14"/>const totalWins = Object.values(data.characterStats).reduce(</text:p>
      <text:p text:style-name="Standard"><text:s text:c="18"/>(sum, stats)=&gt; sum + (stats.wins||0), 0</text:p>
      <text:p text:style-name="Standard"><text:s text:c="14"/>);</text:p>
      <text:p text:style-name="Standard"><text:s text:c="14"/>unlocked = totalWins &gt;= 1;</text:p>
      <text:p text:style-name="Standard"><text:s text:c="14"/>break;</text:p>
      <text:p text:style-name="Standard"><text:soft-page-break/></text:p>
      <text:p text:style-name="Standard"><text:s text:c="10"/>case 'combo_master':</text:p>
      <text:p text:style-name="Standard"><text:s text:c="14"/>unlocked = progress &gt;= (achievement.requirement||50);</text:p>
      <text:p text:style-name="Standard"><text:s text:c="14"/>break;</text:p>
      <text:p text:style-name="Standard"/>
      <text:p text:style-name="Standard"><text:s text:c="10"/>case 'no_damage':</text:p>
      <text:p text:style-name="Standard"><text:s text:c="14"/>unlocked = progress &gt;= (achievement.requirement||1);</text:p>
      <text:p text:style-name="Standard"><text:s text:c="14"/>break;</text:p>
      <text:p text:style-name="Standard"/>
      <text:p text:style-name="Standard"><text:s text:c="10"/>case 'all_characters':</text:p>
      <text:p text:style-name="Standard"><text:s text:c="14"/>// Verificar si se ha ganado al menos una partida con cada personaje</text:p>
      <text:p text:style-name="Standard"><text:s text:c="14"/>const playedChars = Object.keys(data.characterStats).filter(</text:p>
      <text:p text:style-name="Standard"><text:s text:c="18"/>id=&gt; data.characterStats[id].wins &gt; 0</text:p>
      <text:p text:style-name="Standard"><text:s text:c="14"/>);</text:p>
      <text:p text:style-name="Standard"><text:s text:c="14"/>unlocked = playedChars.length &gt;= CHARACTERS.length;</text:p>
      <text:p text:style-name="Standard"><text:s text:c="14"/>break;</text:p>
      <text:p text:style-name="Standard"/>
      <text:p text:style-name="Standard"><text:s text:c="10"/>case 'perfect_round':</text:p>
      <text:p text:style-name="Standard"><text:s text:c="14"/>// Necesitaríamos tracking más detallado (no recibir daño ni perder meter en un round)</text:p>
      <text:p text:style-name="Standard"><text:s text:c="14"/>// Simplificación: usar el conteo de perfectVictories del modo 1P</text:p>
      <text:p text:style-name="Standard"><text:s text:c="14"/>unlocked = data.enemyProgress.perfectVictories &gt;= (achievement.requirement||1);</text:p>
      <text:p text:style-name="Standard"><text:s text:c="14"/>break;</text:p>
      <text:p text:style-name="Standard"/>
      <text:p text:style-name="Standard"><text:s text:c="10"/>case 'special_spammer':</text:p>
      <text:p text:style-name="Standard"><text:s text:c="14"/>const totalSpecials = Object.values(data.characterStats).reduce(</text:p>
      <text:p text:style-name="Standard"><text:s text:c="18"/>(sum, stats)=&gt; sum + (stats.totalspecialsused||0), 0</text:p>
      <text:p text:style-name="Standard"><text:s text:c="14"/>);</text:p>
      <text:p text:style-name="Standard"><text:s text:c="14"/>unlocked = totalSpecials &gt;= (achievement.requirement||100);</text:p>
      <text:p text:style-name="Standard"><text:s text:c="14"/>break;</text:p>
      <text:p text:style-name="Standard"/>
      <text:p text:style-name="Standard"><text:s text:c="10"/>case 'tournament_winner':</text:p>
      <text:p text:style-name="Standard"><text:s text:c="14"/>unlocked = progress &gt;= (achievement.requirement||10);</text:p>
      <text:p text:style-name="Standard"><text:s text:c="14"/>break;</text:p>
      <text:p text:style-name="Standard"/>
      <text:p text:style-name="Standard"><text:s text:c="10"/>default:</text:p>
      <text:p text:style-name="Standard"><text:s text:c="14"/>unlocked = false;</text:p>
      <text:p text:style-name="Standard"><text:s text:c="6"/>}</text:p>
      <text:p text:style-name="Standard"/>
      <text:p text:style-name="Standard"><text:s text:c="6"/>if(unlocked &amp;&amp; !achievement.unlocked){</text:p>
      <text:p text:style-name="Standard"><text:s text:c="10"/>// ¡Nuevo logro desbloqueado!</text:p>
      <text:p text:style-name="Standard"><text:s text:c="10"/>achievement.unlocked = true;</text:p>
      <text:p text:style-name="Standard"><text:s text:c="10"/>achievement.date = Date.now();</text:p>
      <text:p text:style-name="Standard"><text:s text:c="10"/>this.save(data);</text:p>
      <text:p text:style-name="Standard"/>
      <text:p text:style-name="Standard"><text:s text:c="10"/>// Mostrar notificación de logro</text:p>
      <text:p text:style-name="Standard"><text:s text:c="10"/>showAchievementUnlocked(achievementId);</text:p>
      <text:p text:style-name="Standard"><text:s text:c="10"/>return true;</text:p>
      <text:p text:style-name="Standard"><text:s text:c="6"/>}</text:p>
      <text:p text:style-name="Standard"><text:s text:c="6"/>return false;</text:p>
      <text:p text:style-name="Standard"><text:s text:c="2"/>}</text:p>
      <text:p text:style-name="Standard"/>
      <text:p text:style-name="Standard"><text:s text:c="2"/>// Función para mostrar notificación de logro</text:p>
      <text:p text:style-name="Standard"><text:soft-page-break/><text:s text:c="2"/>function showAchievementUnlocked(achievementId){</text:p>
      <text:p text:style-name="Standard"><text:s text:c="6"/>const achievementData = PERSISTENT_DATA.load().achievements[achievementId];</text:p>
      <text:p text:style-name="Standard"><text:s text:c="6"/>let title, description, icon;</text:p>
      <text:p text:style-name="Standard"/>
      <text:p text:style-name="Standard"><text:s text:c="6"/>switch(achievementId){</text:p>
      <text:p text:style-name="Standard"><text:s text:c="10"/>case 'first_win':</text:p>
      <text:p text:style-name="Standard"><text:s text:c="14"/>title = "¡Primera Victoria!";</text:p>
      <text:p text:style-name="Standard"><text:s text:c="14"/>description = "Has ganado tu primera partida en Codegra Fighters.";</text:p>
      <text:p text:style-name="Standard"><text:s text:c="14"/>icon = "🏆";</text:p>
      <text:p text:style-name="Standard"><text:s text:c="14"/>break;</text:p>
      <text:p text:style-name="Standard"><text:s text:c="10"/>case 'combo_master':</text:p>
      <text:p text:style-name="Standard"><text:s text:c="14"/>title = "¡Maestro de Combo!";</text:p>
      <text:p text:style-name="Standard"><text:s text:c="14"/>description = "Has alcanzado un combo de " + (achievementData.requirement||50) + " o más hits.";</text:p>
      <text:p text:style-name="Standard"><text:s text:c="14"/>icon = "🔥";</text:p>
      <text:p text:style-name="Standard"><text:s text:c="14"/>break;</text:p>
      <text:p text:style-name="Standard"><text:s text:c="10"/>case 'no_damage':</text:p>
      <text:p text:style-name="Standard"><text:s text:c="14"/>title = "¡Defensa Impenetrable!";</text:p>
      <text:p text:style-name="Standard"><text:s text:c="14"/>description = "Has ganado una partida sin recibir ningún daño.";</text:p>
      <text:p text:style-name="Standard"><text:s text:c="14"/>icon = "🛡️";</text:p>
      <text:p text:style-name="Standard"><text:s text:c="14"/>break;</text:p>
      <text:p text:style-name="Standard"><text:s text:c="10"/>case 'all_characters':</text:p>
      <text:p text:style-name="Standard"><text:s text:c="14"/>title = "¡Colección Completa!";</text:p>
      <text:p text:style-name="Standard"><text:s text:c="14"/>description = "Has ganado al menos una partida con cada personaje disponible.";</text:p>
      <text:p text:style-name="Standard"><text:s text:c="14"/>icon = "👥";</text:p>
      <text:p text:style-name="Standard"><text:s text:c="14"/>break;</text:p>
      <text:p text:style-name="Standard"><text:s text:c="10"/>case 'perfect_round':</text:p>
      <text:p text:style-name="Standard"><text:s text:c="14"/>title = "¡Ronda Perfecta!";</text:p>
      <text:p text:style-name="Standard"><text:s text:c="14"/>description = "Has completado un round sin recibir daño ni perder tu meter.";</text:p>
      <text:p text:style-name="Standard"><text:s text:c="14"/>icon = "⭐";</text:p>
      <text:p text:style-name="Standard"><text:s text:c="14"/>break;</text:p>
      <text:p text:style-name="Standard"><text:s text:c="10"/>case 'special_spammer':</text:p>
      <text:p text:style-name="Standard"><text:s text:c="14"/>title = "¡Especialista en Especiales!";</text:p>
      <text:p text:style-name="Standard"><text:s text:c="14"/>description = "Has usado tu ataque especial " + (achievementData.requirement||100) + " o más veces.";</text:p>
      <text:p text:style-name="Standard"><text:s text:c="14"/>icon = "💥";</text:p>
      <text:p text:style-name="Standard"><text:s text:c="14"/>break;</text:p>
      <text:p text:style-name="Standard"><text:s text:c="10"/>case 'tournament_winner':</text:p>
      <text:p text:style-name="Standard"><text:s text:c="14"/>title = "¡Campeón de Torneo!";</text:p>
      <text:p text:style-name="Standard"><text:s text:c="14"/>description = "Has ganado 10 o más partidas en modo 2 jugadores.";</text:p>
      <text:p text:style-name="Standard"><text:s text:c="14"/>icon = "🏅";</text:p>
      <text:p text:style-name="Standard"><text:s text:c="14"/>break;</text:p>
      <text:p text:style-name="Standard"><text:s text:c="10"/>default:</text:p>
      <text:p text:style-name="Standard"><text:s text:c="14"/>title = "Logro Desbloqueado";</text:p>
      <text:p text:style-name="Standard"><text:s text:c="14"/>description = "Has logrado algo especial en Codegra Fighters.";</text:p>
      <text:p text:style-name="Standard"><text:s text:c="14"/>icon = "✨";</text:p>
      <text:p text:style-name="Standard"><text:s text:c="6"/>}</text:p>
      <text:p text:style-name="Standard"/>
      <text:p text:style-name="Standard"><text:s text:c="6"/>// Mostrar notificación usando el sistema de partículas existente</text:p>
      <text:p text:style-name="Standard"><text:s text:c="6"/>S.particles.push({</text:p>
      <text:p text:style-name="Standard"><text:s text:c="10"/>type:'banner',</text:p>
      <text:p text:style-name="Standard"><text:s text:c="10"/>text:title,</text:p>
      <text:p text:style-name="Standard"><text:soft-page-break/><text:s text:c="10"/>sub:description,</text:p>
      <text:p text:style-name="Standard"><text:s text:c="10"/>color:'#ffd23f',</text:p>
      <text:p text:style-name="Standard"><text:s text:c="10"/>life:180, // 3 segundos</text:p>
      <text:p text:style-name="Standard"><text:s text:c="10"/>age:0</text:p>
      <text:p text:style-name="Standard"><text:s text:c="6"/>});</text:p>
      <text:p text:style-name="Standard"/>
      <text:p text:style-name="Standard"><text:s text:c="6"/>// También podríamos hacer un sonido especial</text:p>
      <text:p text:style-name="Standard"><text:s text:c="6"/>try{</text:p>
      <text:p text:style-name="Standard"><text:s text:c="10"/>// Usar un sonido existente o crear uno simple</text:p>
      <text:p text:style-name="Standard"><text:s text:c="10"/>AudioEngine.sfxWin(); // Reutilizar el sonido de victoria</text:p>
      <text:p text:style-name="Standard"><text:s text:c="6"/>}catch(e){</text:p>
      <text:p text:style-name="Standard"><text:s text:c="10"/>// Ignorar errores de audio</text:p>
      <text:p text:style-name="Standard"><text:s text:c="6"/>}</text:p>
      <text:p text:style-name="Standard"><text:s text:c="2"/>}</text:p>
      <text:p text:style-name="Standard"/>
      <text:p text:style-name="Standard"><text:s text:c="2"/>Paso 6: Mostrar logros en el menú (opcional)</text:p>
      <text:p text:style-name="Standard"/>
      <text:p text:style-name="Standard"><text:s text:c="2"/>Para completar la experiencia, puedes añadir una sección en el menú de opciones o una nueva pantalla que muestre los logros obtenidos.</text:p>
      <text:p text:style-name="Standard"/>
      <text:p text:style-name="Standard"><text:s text:c="2"/>Busca donde está el menú de opciones y añade una pestaña de "Logros":</text:p>
      <text:p text:style-name="Standard"/>
      <text:p text:style-name="Standard"><text:s text:c="2"/>// En la pantalla de opciones, después de los otros sections, añade:</text:p>
      <text:p text:style-name="Standard"><text:s text:c="2"/>&lt;div style="margin:20px 0;"&gt;</text:p>
      <text:p text:style-name="Standard"><text:s text:c="6"/>&lt;h2 style="color:var(--accent2); text-align:center;"&gt;Logros&lt;/h2&gt;</text:p>
      <text:p text:style-name="Standard"><text:s text:c="6"/>&lt;div id="achievements-list" style="max-height:200px; overflow-y:auto; margin-top:10px;"&gt;&lt;/div&gt;</text:p>
      <text:p text:style-name="Standard"><text:s text:c="2"/>&lt;/div&gt;</text:p>
      <text:p text:style-name="Standard"/>
      <text:p text:style-name="Standard"><text:s text:c="2"/>Luego, en el manejador de mostrar opciones, antes de mostrar la pantalla, agrega:</text:p>
      <text:p text:style-name="Standard"/>
      <text:p text:style-name="Standard"><text:s text:c="2"/>document.getElementById('title-btn-opciones').onclick=()=&gt;{</text:p>
      <text:p text:style-name="Standard"><text:s text:c="6"/>startBgMusic();</text:p>
      <text:p text:style-name="Standard"><text:s text:c="6"/>AudioEngine.init();</text:p>
      <text:p text:style-name="Standard"><text:s text:c="6"/>AudioEngine.startMusic();</text:p>
      <text:p text:style-name="Standard"><text:s text:c="6"/>// Cargar y mostrar logros antes de mostrar la pantalla</text:p>
      <text:p text:style-name="Standard"><text:s text:c="6"/>loadAndDisplayAchievements();</text:p>
      <text:p text:style-name="Standard"><text:s text:c="6"/>showScreen('screen-options');</text:p>
      <text:p text:style-name="Standard"><text:s text:c="2"/>};</text:p>
      <text:p text:style-name="Standard"/>
      <text:p text:style-name="Standard"><text:s text:c="2"/>Y agrega la función:</text:p>
      <text:p text:style-name="Standard"/>
      <text:p text:style-name="Standard"><text:s text:c="2"/>function loadAndDisplayAchievements(){</text:p>
      <text:p text:style-name="Standard"><text:s text:c="6"/>const data = PERSISTENT_DATA.load();</text:p>
      <text:p text:style-name="Standard"><text:s text:c="6"/>const achievements = data.achievements;</text:p>
      <text:p text:style-name="Standard"><text:s text:c="6"/>const container = document.getElementById('achievements-list');</text:p>
      <text:p text:style-name="Standard"><text:s text:c="6"/>if(!container) return;</text:p>
      <text:p text:style-name="Standard"/>
      <text:p text:style-name="Standard"><text:s text:c="6"/>container.innerHTML = ''; // Limpiar</text:p>
      <text:p text:style-name="Standard"/>
      <text:p text:style-name="Standard"><text:s text:c="6"/>Object.entries(achievements).forEach(([id, achievement])=&gt;{</text:p>
      <text:p text:style-name="Standard"><text:s text:c="10"/>const div = document.createElement('div');</text:p>
      <text:p text:style-name="Standard"><text:soft-page-break/><text:s text:c="10"/>div.style.display = 'flex';</text:p>
      <text:p text:style-name="Standard"><text:s text:c="10"/>div.style.alignItems = 'center';</text:p>
      <text:p text:style-name="Standard"><text:s text:c="10"/>div.style.padding = '10px';</text:p>
      <text:p text:style-name="Standard"><text:s text:c="10"/>div.style.margin = '5px 0';</text:p>
      <text:p text:style-name="Standard"><text:s text:c="10"/>div.style.background = achievement.unlocked</text:p>
      <text:p text:style-name="Standard"><text:s text:c="14"/>? 'rgba(0,20,0,0.3)'</text:p>
      <text:p text:style-name="Standard"><text:s text:c="14"/>: 'rgba(20,0,0,0.2)';</text:p>
      <text:p text:style-name="Standard"><text:s text:c="10"/>div.style.borderRadius = '8px';</text:p>
      <text:p text:style-name="Standard"><text:s text:c="10"/>div.style.border = achievement.unlocked</text:p>
      <text:p text:style-name="Standard"><text:s text:c="14"/>? '2px solid var(--accent2)'</text:p>
      <text:p text:style-name="Standard"><text:s text:c="14"/>: '1px solid #555';</text:p>
      <text:p text:style-name="Standard"/>
      <text:p text:style-name="Standard"><text:s text:c="10"/>const icon = document.createElement('span');</text:p>
      <text:p text:style-name="Standard"><text:s text:c="10"/>icon.style.fontSize = '24px';</text:p>
      <text:p text:style-name="Standard"><text:s text:c="10"/>icon.style.marginRight = '10px';</text:p>
      <text:p text:style-name="Standard"><text:s text:c="10"/>icon.style.opacity = achievement.unlocked ? '1' : '0.5';</text:p>
      <text:p text:style-name="Standard"/>
      <text:p text:style-name="Standard"><text:s text:c="10"/>// Asignar icono basado en el id (simplificado)</text:p>
      <text:p text:style-name="Standard"><text:s text:c="10"/>switch(id){</text:p>
      <text:p text:style-name="Standard"><text:s text:c="14"/>case 'first_win': icon.textContent = '🏆'; break;</text:p>
      <text:p text:style-name="Standard"><text:s text:c="14"/>case 'combo_master': icon.textContent = '🔥'; break;</text:p>
      <text:p text:style-name="Standard"><text:s text:c="14"/>case 'no_damage': icon.textContent = '🛡️'; break;</text:p>
      <text:p text:style-name="Standard"><text:s text:c="14"/>case 'all_characters': icon.textContent = '👥'; break;</text:p>
      <text:p text:style-name="Standard"><text:s text:c="14"/>case 'perfect_round': icon.textContent = '⭐'; break;</text:p>
      <text:p text:style-name="Standard"><text:s text:c="14"/>case 'special_spammer': icon.textContent = '💥'; break;</text:p>
      <text:p text:style-name="Standard"><text:s text:c="14"/>case 'tournament_winner': icon.textContent = '🏅'; break;</text:p>
      <text:p text:style-name="Standard"><text:s text:c="14"/>default: icon.textContent = '✨';</text:p>
      <text:p text:style-name="Standard"><text:s text:c="10"/>}</text:p>
      <text:p text:style-name="Standard"/>
      <text:p text:style-name="Standard"><text:s text:c="10"/>const textDiv = document.createElement('div');</text:p>
      <text:p text:style-name="Standard"><text:s text:c="10"/>textDiv.style.flex = '1';</text:p>
      <text:p text:style-name="Standard"><text:s text:c="10"/>textDiv.style.color = achievement.unlocked ? 'var(--cream)' : '#aaa';</text:p>
      <text:p text:style-name="Standard"/>
      <text:p text:style-name="Standard"><text:s text:c="10"/>let title, description;</text:p>
      <text:p text:style-name="Standard"><text:s text:c="10"/>switch(id){</text:p>
      <text:p text:style-name="Standard"><text:s text:c="14"/>case 'first_win':</text:p>
      <text:p text:style-name="Standard"><text:s text:c="18"/>title = "Primera Victoria";</text:p>
      <text:p text:style-name="Standard"><text:s text:c="18"/>description = "Gana tu primera partida";</text:p>
      <text:p text:style-name="Standard"><text:s text:c="18"/>break;</text:p>
      <text:p text:style-name="Standard"><text:s text:c="14"/>case 'combo_master':</text:p>
      <text:p text:style-name="Standard"><text:s text:c="18"/>title = "Maestro de Combo";</text:p>
      <text:p text:style-name="Standard"><text:s text:c="18"/>description = "Alcanza un combo de "+(achievement.requirement||50)+" o más";</text:p>
      <text:p text:style-name="Standard"><text:s text:c="18"/>break;</text:p>
      <text:p text:style-name="Standard"><text:s text:c="14"/>// ... etc para otros logros ...</text:p>
      <text:p text:style-name="Standard"><text:s text:c="14"/>default:</text:p>
      <text:p text:style-name="Standard"><text:s text:c="18"/>title = id.replace('_', ' ').replace(/^\w/, c=&gt; c.toUpperCase());</text:p>
      <text:p text:style-name="Standard"><text:s text:c="18"/>description = "Desbloquea este logro";</text:p>
      <text:p text:style-name="Standard"><text:s text:c="10"/>}</text:p>
      <text:p text:style-name="Standard"/>
      <text:p text:style-name="Standard"><text:s text:c="10"/>textDiv.innerHTML = `&lt;strong&gt;${title}&lt;/strong&gt;&lt;br&gt;&lt;small&gt;${description}&lt;/small&gt;`;</text:p>
      <text:p text:style-name="Standard"><text:s text:c="10"/>if(!achievement.unlocked &amp;&amp; achievement.requirement){</text:p>
      <text:p text:style-name="Standard"><text:s text:c="14"/>const progress = /* obtener progreso actual */ 0; // Necesitaríamos tracking</text:p>
      <text:p text:style-name="Standard"><text:soft-page-break/><text:s text:c="14"/>textDiv.innerHTML += `&lt;br&gt;&lt;span style="font-size:12px;"&gt;Progreso: ${progress}/${achievement.requirement}&lt;/span&gt;`;</text:p>
      <text:p text:style-name="Standard"><text:s text:c="10"/>}</text:p>
      <text:p text:style-name="Standard"/>
      <text:p text:style-name="Standard"><text:s text:c="10"/>div.appendChild(icon);</text:p>
      <text:p text:style-name="Standard"><text:s text:c="10"/>div.appendChild(textDiv);</text:p>
      <text:p text:style-name="Standard"><text:s text:c="10"/>container.appendChild(div);</text:p>
      <text:p text:style-name="Standard"><text:s text:c="6"/>});</text:p>
      <text:p text:style-name="Standard"><text:s text:c="2"/>}</text:p>
      <text:p text:style-name="Standard"/>
      <text:p text:style-name="Standard"><text:s text:c="2"/>✅ Beneficios del sistema de almacenamiento y logros:</text:p>
      <text:p text:style-name="Standard"/>
      <text:p text:style-name="Standard"><text:s text:c="2"/>- Persistencia real: El juego recuerda tu progreso entre sesiones</text:p>
      <text:p text:style-name="Standard"><text:s text:c="2"/>- Motivación a largo plazo: Los logros dan objetivos más allá de simplemente ganar</text:p>
      <text:p text:style-name="Standard"><text:s text:c="2"/>- Estadísticas significativas: Puedes ver cuál es tu personaje más exitoso, tu mejor combo, etc.</text:p>
      <text:p text:style-name="Standard"><text:s text:c="2"/>- Rejugabilidad: Intentar desbloquear todos los logros aumenta el tiempo de juego</text:p>
      <text:p text:style-name="Standard"><text:s text:c="2"/>- Sensación de progreso: Sentir que estás avanzando incluso si no mejoras mucho en skill</text:p>
      <text:p text:style-name="Standard"><text:s text:c="2"/>- Base para futuras características: Este sistema puede expandirse con tablas de clasificación, desafíos diarios, etc.</text:p>
      <text:p text:style-name="Standard"/>
      <text:p text:style-name="Standard"><text:s text:c="2"/>📝 Notas de implementación:</text:p>
      <text:p text:style-name="Standard"/>
      <text:p text:style-name="Standard"><text:s text:c="2"/>1. Este sistema es relativamente seguro de agregar ya que no afecta el gameplay central</text:p>
      <text:p text:style-name="Standard"><text:s text:c="2"/>2. Comienza con solo el guardado básico de opciones y victorias/derrotas</text:p>
      <text:p text:style-name="Standard"><text:s text:c="2"/>3. Añade los logros más simples primero (primer victoria, combo alto)</text:p>
      <text:p text:style-name="Standard"><text:s text:c="2"/>4. Prueba extensively: guarda, recarga la página, verifica que los datos persisten</text:p>
      <text:p text:style-name="Standard"><text:s text:c="2"/>5. Considera encriptar o ofuscar ligeramente los datos si te preocupa que los jugadores los modifiquen (aunque para un juego local, suele ser innecesario)</text:p>
      <text:p text:style-name="Standard"><text:s text:c="2"/>6. El tiempo de juego total requiere manejo cuidadoso de pausas y pestañas ocultas</text:p>
      <text:p text:style-name="Standard"/>
      <text:p text:style-name="Standard"><text:s text:c="2"/>---</text:p>
      <text:p text:style-name="Standard"><text:s text:c="2"/>🎯 RESUMEN DE IMPLEMENTACIÓN POR FASES</text:p>
      <text:p text:style-name="Standard"/>
      <text:p text:style-name="Standard"><text:s text:c="2"/>Para hacer esto manejable, te sugiero dividirlo en estas fases:</text:p>
      <text:p text:style-name="Standard"/>
      <text:p text:style-name="Standard"><text:s text:c="2"/>✅ Fase 1: Fundación (1-2 horas)</text:p>
      <text:p text:style-name="Standard"/>
      <text:p text:style-name="Standard"><text:s text:c="2"/>- [ ] Optimización de assets (extraer imágenes a archivos externos)</text:p>
      <text:p text:style-name="Standard"><text:s text:c="2"/>- [ ] Implementar sistema de carga con fallback</text:p>
      <text:p text:style-name="Standard"><text:s text:c="2"/>- [ ] Probar que el juego sigue funcionando correctamente</text:p>
      <text:p text:style-name="Standard"/>
      <text:p text:style-name="Standard"><text:s text:c="2"/>✅ Fase 2: Nuevas características (2-3 horas)</text:p>
      <text:p text:style-name="Standard"/>
      <text:p text:style-name="Standard"><text:s text:c="2"/>- [ ] Añadir modo entrenamiento (pantalla + lógica básica)</text:p>
      <text:p text:style-name="Standard"><text:s text:c="2"/>- [ ] Implementar guardado de opciones en localStorage</text:p>
      <text:p text:style-name="Standard"><text:s text:c="2"/>- [ ] Crear pantallas de opciones y entrenamiento</text:p>
      <text:p text:style-name="Standard"/>
      <text:p text:style-name="Standard"><text:s text:c="2"/>⚙️ Fase 3: Mejora de gameplay (3-4 horas)</text:p>
      <text:p text:style-name="Standard"/>
      <text:p text:style-name="Standard"><text:s text:c="2"/>- [ ] Mejorar sistema de combo (tracking, bonificaciones, visuales)</text:p>
      <text:p text:style-name="Standard"><text:s text:c="2"/>- [ ] Implementar IA mejorada (comenzar con 2 estados, añadir más después)</text:p>
      <text:p text:style-name="Standard"><text:s text:c="2"/>- [ ] Añadir visuales de debug opcionales (hitboxes/hurtboxes)</text:p>
      <text:p text:style-name="Standard"><text:soft-page-break/></text:p>
      <text:p text:style-name="Standard"><text:s text:c="2"/>🎨 Fase 4: Pulido y accesibilidad (2-3 horas)</text:p>
      <text:p text:style-name="Standard"/>
      <text:p text:style-name="Standard"><text:s text:c="2"/>- [ ] Completar menú de opciones con todos los controles</text:p>
      <text:p text:style-name="Standard"><text:s text:c="2"/>- [ ] Integrar opciones en el juego (volumen, daltonismo, reducir efectos)</text:p>
      <text:p text:style-name="Standard"><text:s text:c="2"/>- [ ] Añadir indicadores visuales de golpe/parry opcionales</text:p>
      <text:p text:style-name="Standard"/>
      <text:p text:style-name="Standard"><text:s text:c="2"/>🏆 Fase 5: Persistencia y logros (2-3 horas)</text:p>
      <text:p text:style-name="Standard"/>
      <text:p text:style-name="Standard"><text:s text:c="2"/>- [ ] Implementar sistema de almacenamiento de logros y estadísticas</text:p>
      <text:p text:style-name="Standard"><text:s text:c="2"/>- [ ] Añadir tracking de victorias, derrotas, mejores combos</text:p>
      <text:p text:style-name="Standard"><text:s text:c="2"/>- [ ] Implementar sistema de logros con notificaciones</text:p>
      <text:p text:style-name="Standard"/>
      <text:p text:style-name="Standard"><text:s text:c="2"/>🧪 Fase 6: Pruebas y ajuste (1-2 horas)</text:p>
      <text:p text:style-name="Standard"/>
      <text:p text:style-name="Standard"><text:s text:c="2"/>- [ ] Probar todas las nuevas características</text:p>
      <text:p text:style-name="Standard"><text:s text:c="2"/>- [ ] Ajustar valores de balance (daño de combos, frecuencia de IA, etc.)</text:p>
      <text:p text:style-name="Standard"><text:s text:c="2"/>- [ ] Verificar que no se introdujeron bugs</text:p>
      <text:p text:style-name="Standard"><text:s text:c="2"/>- [ ] Recopilar retroalimentación y hacer ajustes finales</text:p>
      <text:p text:style-name="Standard"/>
      <text:p text:style-name="Standard"><text:s text:c="2"/>---</text:p>
      <text:p text:style-name="Standard"><text:s text:c="2"/>📚 RECURSOS Y HERRAMIENTAS RECOMENDADAS</text:p>
      <text:p text:style-name="Standard"/>
      <text:p text:style-name="Standard"><text:s text:c="2"/>1. Para optimización de imágenes:</text:p>
      <text:p text:style-name="Standard"><text:s text:c="4"/>- https://tinypng.com (muy bueno para PNG con transparencia)</text:p>
      <text:p text:style-name="Standard"><text:s text:c="4"/>- https://imageoptim.com (Mac) o https://fileoptimizer.guiformage.com (Windows/Linux)</text:p>
      <text:p text:style-name="Standard"><text:s text:c="4"/>- Considera reducir a 256 colores si la imagen lo permite sin perder calidad notable</text:p>
      <text:p text:style-name="Standard"><text:s text:c="2"/>2. Para probar el juego localmente:</text:p>
      <text:p text:style-name="Standard"><text:s text:c="4"/>- En la terminal: python -m http.server 8000 (navega a localhost:8000)</text:p>
      <text:p text:style-name="Standard"><text:s text:c="4"/>- O usa la extensión "Live Server" de VS Code</text:p>
      <text:p text:style-name="Standard"><text:s text:c="4"/>- Esto evita problemas de CORS al cargar archivos locales</text:p>
      <text:p text:style-name="Standard"><text:s text:c="2"/>3. Para depuración:</text:p>
      <text:p text:style-name="Standard"><text:s text:c="4"/>- Abre la consola del navegador (F12) para ver errores y logs</text:p>
      <text:p text:style-name="Standard"><text:s text:c="4"/>- Usa debugger; en puntos estratégicos para pausar la ejecución</text:p>
      <text:p text:style-name="Standard"><text:s text:c="4"/>- El objeto S (state) y PERSISTENT_DATA son excelentes para inspeccionar estado</text:p>
      <text:p text:style-name="Standard"><text:s text:c="2"/>4. Para balancing:</text:p>
      <text:p text:style-name="Standard"><text:s text:c="4"/>- Lleva un registro de qué valores cambias y por qué</text:p>
      <text:p text:style-name="Standard"><text:s text:c="4"/>- Prueba con diferentes niveles de habilidad (tú mismo, amigos si es posible)</text:p>
      <text:p text:style-name="Standard"><text:s text:c="4"/>- Considera crear un modo "test" que muestre más información de debug</text:p>
      <text:p text:style-name="Standard"/>
      <text:p text:style-name="Standard"><text:s text:c="2"/>---</text:p>
      <text:p text:style-name="Standard"><text:s text:c="2"/>⚠️ ADVERTENCIAS IMPORTANTES</text:p>
      <text:p text:style-name="Standard"/>
      <text:p text:style-name="Standard"><text:s text:c="2"/>1. Haz copias de seguridad frecuentes: Después de cada fase exitosa, haz una copia</text:p>
      <text:p text:style-name="Standard"><text:s text:c="2"/>2. Prueba en un navegador moderno: Chrome, Firefox o Edge funcionarán mejor</text:p>
      <text:p text:style-name="Standard"><text:s text:c="2"/>3. Ten paciencia con la IA: Es complejo y puede requerir varios intentos para sentirse bien</text:p>
      <text:p text:style-name="Standard"><text:s text:c="2"/>4. Los valores de balance son subjetivos: Lo que parece justo para ti puede no serlo para otros; ajusta basado en tu experiencia</text:p>
      <text:p text:style-name="Standard"><text:s text:c="2"/>5. Algunas características pueden interactuar de maneras inesperadas: Por ejemplo, el modo de bloquear mantener presionado afecta cómo funciona el parry</text:p>
      <text:p text:style-name="Standard"><text:s text:c="2"/>6. No intentes hacerlo todo de una vez: Tomarte el tiempo para hacer bien cada fase dará mejor resultado</text:p>
      <text:p text:style-name="Standard"><text:soft-page-break/></text:p>
      <text:p text:style-name="Standard"><text:s text:c="2"/>---</text:p>
      <text:p text:style-name="Standard"><text:s text:c="2"/>🚀 PRÓXIMOS PASOS INMEDIATOS</text:p>
      <text:p text:style-name="Standard"/>
      <text:p text:style-name="Standard"><text:s text:c="2"/>Si quieres comenzar ahora mismo, aquí tienes tu plan de acción para las próximas 24 horas:</text:p>
      <text:p text:style-name="Standard"/>
      <text:p text:style-name="Standard"><text:s text:c="2"/>Hora 0-1: Preparación</text:p>
      <text:p text:style-name="Standard"/>
      <text:p text:style-name="Standard"><text:s text:c="2"/>- [ ] Haz una copia de tu archivo actual: Codegra fighters_backup.html</text:p>
      <text:p text:style-name="Standard"><text:s text:c="2"/>- [ ] Crea la carpeta de assets y subcarpetas</text:p>
      <text:p text:style-name="Standard"><text:s text:c="2"/>- [ ] Descarga una herramienta de optimización de imágenes</text:p>
      <text:p text:style-name="Standard"/>
      <text:p text:style-name="Standard"><text:s text:c="2"/>Hora 1-3: Fase 1 - Assets</text:p>
      <text:p text:style-name="Standard"/>
      <text:p text:style-name="Standard"><text:s text:c="2"/>- [ ] Extrae las 10 imágenes más grandes (usa la herramienta para ver cuáles ocupan más espacio)</text:p>
      <text:p text:style-name="Standard"><text:s text:c="2"/>- [ ] Reemplaza sus data URIs por rutas a archivos externos</text:p>
      <text:p text:style-name="Standard"><text:s text:c="2"/>- [ ] Implementa la función loadImageWithFallback</text:p>
      <text:p text:style-name="Standard"><text:s text:c="2"/>- [ ] Prueba que el juego sigue cargando y mostrándose correctamente</text:p>
      <text:p text:style-name="Standard"/>
      <text:p text:style-name="Standard"><text:s text:c="2"/>Hora 3-5: Preparación para Fase 2</text:p>
      <text:p text:style-name="Standard"/>
      <text:p text:style-name="Standard"><text:s text:c="2"/>- [ ] Añade el botón de entrenamiento al menú título</text:p>
      <text:p text:style-name="Standard"><text:s text:c="2"/>- [ ] Añade el botón de opciones al menú título</text:p>
      <text:p text:style-name="Standard"><text:s text:c="2"/>- [ ] Crea las estructuras básicas de las pantallas de entrenamiento y opciones</text:p>
      <text:p text:style-name="Standard"><text:s text:c="2"/>- [ ] Prueba que navegas correctamente a las nuevas pantallas</text:p>
      <text:p text:style-name="Standard"/>
      <text:p text:style-name="Standard"><text:s text:c="2"/>Hora 5-7: Fase 2 - Características básicas</text:p>
      <text:p text:style-name="Standard"/>
      <text:p text:style-name="Standard"><text:s text:c="2"/>- [ ] Implementa loadOptions() y saveOptions()</text:p>
      <text:p text:style-name="Standard"><text:s text:c="2"/>- [ ] Conecta los sliders de volumen para que guarden y apliquen cambios</text:p>
      <text:p text:style-name="Standard"><text:s text:c="2"/>- [ ] Implementa startTraining() básica (sin oponente inteligente todavía)</text:p>
      <text:p text:style-name="Standard"><text:s text:c="2"/>- [ ] Prueba que puedes entrar al modo entrenamiento y ver los fighters</text:p>
      <text:p text:style-name="Standard"/>
      <text:p text:style-name="Standard"><text:s text:c="2"/>Hora 7-9: Continuar Fase 2</text:p>
      <text:p text:style-name="Standard"/>
      <text:p text:style-name="Standard"><text:s text:c="2"/>- [ ] Añade los checkboxes de opciones básicas (colorblind, reducir efectos, etc.)</text:p>
      <text:p text:style-name="Standard"><text:s text:c="2"/>- [ ] Implementa los visuales de hitboxes/hurtboxes opcionales</text:p>
      <text:p text:style-name="Standard"><text:s text:c="2"/>- [ ] Prueba que las opciones se guardan y cargan entre recargas de página</text:p>
      <text:p text:style-name="Standard"/>
      <text:p text:style-name="Standard"><text:s text:c="2"/>Hora 9-12: Descanso y evaluación</text:p>
      <text:p text:style-name="Standard"/>
      <text:p text:style-name="Standard"><text:s text:c="2"/>- [ ] Toma un descanso, juega un poco a tu versión actual</text:p>
      <text:p text:style-name="Standard"><text:s text:c="2"/>- [ ] Anota qué te gusta y qué se siente raro o necesita ajuste</text:p>
      <text:p text:style-name="Standard"><text:s text:c="2"/>- [ ] Planifica la siguiente ronda de trabajo basado en tus observaciones</text:p>
      <text:p text:style-name="Standard"/>
      <text:p text:style-name="Standard"><text:s text:c="2"/>Hora 12-15: Fase 3 - Combo y IA</text:p>
      <text:p text:style-name="Standard"/>
      <text:p text:style-name="Standard"><text:s text:c="2"/>- [ ] Implementa el tracking mejorado de combos</text:p>
      <text:p text:style-name="Standard"><text:s text:c="2"/>- [ ] Mejora el popup de combo para mostrar variedad y bonificaciones</text:p>
      <text:p text:style-name="Standard"><text:s text:c="2"/>- [ ] Comienza a implementar la IA mejorada con solo 2 estados (agresivo/defensivo)</text:p>
      <text:p text:style-name="Standard"><text:s text:c="2"/>- [ ] Prueba en modo entrenamiento contra la IA</text:p>
      <text:p text:style-name="Standard"/>
      <text:p text:style-name="Standard"><text:soft-page-break/><text:s text:c="2"/>Hora 15-18: Fase 3 Continua</text:p>
      <text:p text:style-name="Standard"/>
      <text:p text:style-name="Standard"><text:s text:c="2"/>- [ ] Termina de implementar todos los estados de IA</text:p>
      <text:p text:style-name="Standard"><text:s text:c="2"/>- [ ] Añade los beneficios tácticos de combos altos (reducción de recovery, stun chance)</text:p>
      <text:p text:style-name="Standard"><text:s text:c="2"/>- [ ] Ajusta valores basado en tus pruebas de juego</text:p>
      <text:p text:style-name="Standard"/>
      <text:p text:style-name="Standard"><text:s text:c="2"/>Hora 18-21: Fase 4 y 5</text:p>
      <text:p text:style-name="Standard"/>
      <text:p text:style-name="Standard"><text:s text:c="2"/>- [ ] Completa el menú de opciones con todos los controles</text:p>
      <text:p text:style-name="Standard"><text:s text:c="2"/>- [ ] Implementa el sistema de logros básicos (primer victoria, combo alto)</text:p>
      <text:p text:style-name="Standard"><text:s text:c="2"/>- [ ] Añade notificaciones de logro usando el sistema de partículas</text:p>
      <text:p text:style-name="Standard"/>
      <text:p text:style-name="Standard"><text:s text:c="2"/>Hora 21-24: Pulido y pruebas</text:p>
      <text:p text:style-name="Standard"/>
      <text:p text:style-name="Standard"><text:s text:c="2"/>- [ ] Juega extensamente en todos los modos</text:p>
      <text:p text:style-name="Standard"><text:s text:c="2"/>- [ ] Ajusta cualquier valor que se sienta desbalanceado</text:p>
      <text:p text:style-name="Standard"><text:s text:c="2"/>- [ ] Verifica que no haya memoria leak o rendimiento degradado</text:p>
      <text:p text:style-name="Standard"><text:s text:c="2"/>- [ ] Prepara tu versión final para compartir o seguir mejorando</text:p>
      <text:p text:style-name="Standard"/>
      <text:p text:style-name="Standard"><text:s text:c="2"/>---</text:p>
      <text:p text:style-name="Standard"><text:s text:c="2"/>💬 REFLEXIÓN FINAL</text:p>
      <text:p text:style-name="Standard"/>
      <text:p text:style-name="Standard"><text:s text:c="2"/>Has creado algo realmente impresionante con Codegra Fighters. El hecho de que hayas construido un fighting game completo desde cero, con motor de audio sintetizado, rigging de píxeles, y tanta atención al</text:p>
      <text:p text:style-name="Standard"><text:s text:c="2"/>detalle, es un logro significativo. Estas mejoras no están destinadas a "arreglar" problemas fundamentales, sino a elevar un juego ya excelente a su máximo potencial.</text:p>
      <text:p text:style-name="Standard"/>
      <text:p text:style-name="Standard"><text:s text:c="2"/>Recuerda que el desarrollo de juegos es un proceso iterativo. Lo que más importa es que te diviertas creando y mejorando tu juego. Cada pequeño ajuste que haces es una oportunidad para aprender algo nuevo</text:p>
      <text:p text:style-name="Standard"><text:s text:c="2"/>sobre diseño de juegos, programación, y sobre ti mismo como creador.</text:p>
      <text:p text:style-name="Standard"/>
      <text:p text:style-name="Standard"><text:s text:c="2"/>Si en algún momento te atas o no sabes cómo proceder con alguna de estas mejoras, no dudes en preguntar nuevamente. Estoy aquí para ayudarte a hacer realidad la visión que tienes para Codegra Fighters.</text:p>
      <text:p text:style-name="Standard"/>
      <text:p text:style-name="Standard"><text:s text:c="2"/>¡Mucho éxito con tu proyecto! No puedo esperar para ver cómo evoluciona. 🎮✨</text:p>
      <text:p text:style-name="Standard"/>
      <text:p text:style-name="Standard"><text:s text:c="2"/>---</text:p>
      <text:p text:style-name="Standard"><text:s text:c="2"/>Nota final: Esta guía está escrita pensando en tu implementación específica en un solo archivo HTML. Si en el futuro decides dividir tu código en múltiples archivos (JavaScript separado, CSS externo, etc.),</text:p>
      <text:p text:style-name="Standard"><text:s text:c="2"/>muchas de estas mejoras serían aún más fáciles de implementar y mantener. Pero para tu arquitectura actual, este plan debería funcionar perfectamente.</text:p>
      <text:p text:style-name="Standard"/>
      <text:p text:style-name="Standard"><text:s text:c="2"/>¡Adelante y que la fuerza del combos sea contigo! 💪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2T18:43:11.852502300</meta:creation-date>
    <dc:date>2026-06-22T18:43:17.376211200</dc:date>
    <meta:editing-duration>PT7S</meta:editing-duration>
    <meta:editing-cycles>1</meta:editing-cycles>
    <meta:document-statistic meta:table-count="0" meta:image-count="0" meta:object-count="0" meta:page-count="42" meta:paragraph-count="1723" meta:word-count="8986" meta:character-count="81027" meta:non-whitespace-character-count="60877"/>
    <meta:generator>LibreOffice/25.2.5.2$Windows_X86_64 LibreOffice_project/03d19516eb2e1dd5d4ccd751a0d6f35f35e08022</meta:generator>
  </office:meta>
</office:document-meta>
</file>